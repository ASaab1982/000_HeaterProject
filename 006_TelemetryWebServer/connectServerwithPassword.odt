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Textbody">cd<text:s/>C:\Users\dalia\OneDrive\Documents\Arduino\000_HeaterProject\001_ControlTheLEDFromTheInternet</text:p>
      <text:p text:style-name="Textbody">$env:WEB_USERNAME="ahmad"; $env:WEB_PASSWORD="dalia"; npm start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hmad Saab</dc:creator>
    <meta:creation-date>2026-03-31T16:06:00Z</meta:creation-date>
    <dc:date>2026-04-09T14:52:00Z</dc:date>
    <meta:template xlink:href="Normal.dotm" xlink:type="simple"/>
    <meta:editing-cycles>5</meta:editing-cycles>
    <meta:editing-duration>PT60S</meta:editing-duration>
    <meta:document-statistic meta:page-count="1" meta:paragraph-count="1" meta:word-count="24" meta:character-count="161" meta:row-count="1" meta:non-whitespace-character-count="138"/>
  </office:meta>
</office:document-meta>
</file>