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16pt" style:text-underline-style="solid" style:text-underline-width="auto" style:text-underline-color="font-color" fo:font-weight="bold" officeooo:rsid="001fa140" officeooo:paragraph-rsid="001fa140" style:font-size-asian="16pt" style:font-weight-asian="bold" style:font-size-complex="16pt" style:font-weight-complex="bold"/>
    </style:style>
    <style:style style:name="P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" style:family="paragraph" style:parent-style-name="Standard">
      <style:text-properties style:font-name="Calibri" officeooo:rsid="001fa140" officeooo:paragraph-rsid="001fa140"/>
    </style:style>
    <style:style style:name="P4" style:family="paragraph" style:parent-style-name="Standard">
      <style:paragraph-properties fo:break-before="page"/>
      <style:text-properties style:font-name="Calibri" officeooo:rsid="001fa140" officeooo:paragraph-rsid="001fa140"/>
    </style:style>
    <style:style style:name="P5" style:family="paragraph" style:parent-style-name="Heading_20_1">
      <style:text-properties style:font-name="Calibri"/>
    </style:style>
    <style:style style:name="P6" style:family="paragraph" style:parent-style-name="Standard" style:list-style-name="L1">
      <style:text-properties style:font-name="Calibri" officeooo:rsid="001fa140" officeooo:paragraph-rsid="001fa140"/>
    </style:style>
    <style:style style:name="P7" style:family="paragraph" style:parent-style-name="Standard" style:list-style-name="L1">
      <style:text-properties style:font-name="Calibri" officeooo:rsid="002022f1" officeooo:paragraph-rsid="002022f1"/>
    </style:style>
    <style:style style:name="P8" style:family="paragraph" style:parent-style-name="Standard" style:list-style-name="L2">
      <style:text-properties style:font-name="Calibri" officeooo:rsid="001fa140" officeooo:paragraph-rsid="001fa140"/>
    </style:style>
    <style:style style:name="P9" style:family="paragraph" style:parent-style-name="Standard" style:list-style-name="L3">
      <style:text-properties style:font-name="Calibri" officeooo:rsid="001fa140" officeooo:paragraph-rsid="001fa140"/>
    </style:style>
    <style:style style:name="P10" style:family="paragraph" style:parent-style-name="Standard" style:list-style-name="L2">
      <style:text-properties style:font-name="Calibri" officeooo:rsid="002022f1" officeooo:paragraph-rsid="002022f1"/>
    </style:style>
    <style:style style:name="P11" style:family="paragraph" style:parent-style-name="Standard" style:list-style-name="L2">
      <style:text-properties style:font-name="Calibri" officeooo:rsid="00268e14" officeooo:paragraph-rsid="00268e14"/>
    </style:style>
    <style:style style:name="P12" style:family="paragraph" style:parent-style-name="Standard">
      <style:text-properties style:font-name="Calibri" officeooo:rsid="002022f1" officeooo:paragraph-rsid="002022f1"/>
    </style:style>
    <style:style style:name="P13" style:family="paragraph" style:parent-style-name="Standard">
      <style:text-properties style:font-name="Calibri" officeooo:paragraph-rsid="002022f1"/>
    </style:style>
    <style:style style:name="P14" style:family="paragraph" style:parent-style-name="Heading_20_1">
      <style:paragraph-properties fo:break-before="page"/>
      <style:text-properties style:font-name="Calibri" officeooo:paragraph-rsid="002a4fba"/>
    </style:style>
    <style:style style:name="P15" style:family="paragraph" style:parent-style-name="Text_20_body">
      <style:text-properties style:font-name="Calibri" officeooo:paragraph-rsid="002a4fba"/>
    </style:style>
    <style:style style:name="P16" style:family="paragraph" style:parent-style-name="Text_20_body">
      <style:text-properties style:font-name="Calibri" fo:font-weight="bold" style:font-weight-asian="bold" style:font-weight-complex="bold"/>
    </style:style>
    <style:style style:name="P17" style:family="paragraph" style:parent-style-name="Text_20_body" style:list-style-name="L4">
      <style:text-properties style:font-name="Calibri"/>
    </style:style>
    <style:style style:name="P18" style:family="paragraph" style:parent-style-name="Text_20_body">
      <style:text-properties style:font-name="Calibri"/>
    </style:style>
    <style:style style:name="P19" style:family="paragraph" style:parent-style-name="Heading_20_1">
      <style:paragraph-properties fo:break-before="page"/>
      <style:text-properties style:font-name="Calibri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style:font-name="Calibri"/>
    </style:style>
    <style:style style:name="P21" style:family="paragraph" style:parent-style-name="Text_20_body" style:list-style-name="L4"/>
    <style:style style:name="P22" style:family="paragraph" style:parent-style-name="Text_20_body" style:list-style-name="L4">
      <style:text-properties style:font-name="Calibri" officeooo:paragraph-rsid="002c1574"/>
    </style:style>
    <style:style style:name="P23" style:family="paragraph" style:parent-style-name="Text_20_body" style:list-style-name="L4">
      <style:text-properties officeooo:paragraph-rsid="002ac535"/>
    </style:style>
    <style:style style:name="P24" style:family="paragraph" style:parent-style-name="Text_20_body" style:list-style-name="L4">
      <style:text-properties style:font-name="Calibri" officeooo:paragraph-rsid="002ac535"/>
    </style:style>
    <style:style style:name="P25" style:family="paragraph" style:parent-style-name="Text_20_body" style:list-style-name="L5">
      <style:text-properties style:font-name="Calibri"/>
    </style:style>
    <style:style style:name="P26" style:family="paragraph" style:parent-style-name="Text_20_body">
      <style:text-properties style:font-name="Calibri" officeooo:paragraph-rsid="00359746"/>
    </style:style>
    <style:style style:name="P27" style:family="paragraph" style:parent-style-name="Text_20_body" style:list-style-name="L5">
      <style:text-properties style:font-name="Calibri" fo:font-weight="bold" style:font-weight-asian="bold" style:font-weight-complex="bold"/>
    </style:style>
    <style:style style:name="P28" style:family="paragraph" style:parent-style-name="Text_20_body" style:list-style-name="L4">
      <style:text-properties style:font-name="Calibri" officeooo:paragraph-rsid="003612c9"/>
    </style:style>
    <style:style style:name="P29" style:family="paragraph" style:parent-style-name="Text_20_body" style:list-style-name="L4">
      <style:text-properties style:font-name="Calibri" officeooo:paragraph-rsid="00372ff2"/>
    </style:style>
    <style:style style:name="P30" style:family="paragraph" style:parent-style-name="Text_20_body" style:list-style-name="L4">
      <style:text-properties officeooo:paragraph-rsid="00308d62"/>
    </style:style>
    <style:style style:name="P31" style:family="paragraph" style:parent-style-name="Text_20_body" style:list-style-name="L4">
      <style:text-properties style:font-name="Calibri" officeooo:paragraph-rsid="00308d62"/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Calibri" officeooo:paragraph-rsid="0030e8b1"/>
    </style:style>
    <style:style style:name="P34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Calibri"/>
    </style:style>
    <style:style style:name="P35" style:family="paragraph" style:parent-style-name="Text_20_body" style:list-style-name="L6">
      <style:paragraph-properties fo:margin-left="0cm" fo:margin-right="0cm" fo:text-indent="0cm" style:auto-text-indent="false" fo:padding="0cm" fo:border="none"/>
      <style:text-properties style:font-name="Calibri"/>
    </style:style>
    <style:style style:name="T1" style:family="text">
      <style:text-properties officeooo:rsid="002022f1"/>
    </style:style>
    <style:style style:name="T2" style:family="text">
      <style:text-properties officeooo:rsid="00268e1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ab053"/>
    </style:style>
    <style:style style:name="T5" style:family="text">
      <style:text-properties officeooo:rsid="002ac535"/>
    </style:style>
    <style:style style:name="T6" style:family="text">
      <style:text-properties style:font-name="Calibri"/>
    </style:style>
    <style:style style:name="T7" style:family="text">
      <style:text-properties style:font-name="Calibri" officeooo:rsid="002c1574"/>
    </style:style>
    <style:style style:name="T8" style:family="text">
      <style:text-properties officeooo:rsid="002c1574"/>
    </style:style>
    <style:style style:name="T9" style:family="text">
      <style:text-properties style:font-name="Calibri" officeooo:rsid="002ac535"/>
    </style:style>
    <style:style style:name="T10" style:family="text">
      <style:text-properties fo:font-weight="bold" officeooo:rsid="003612c9" style:font-weight-asian="bold" style:font-weight-complex="bold"/>
    </style:style>
    <style:style style:name="T11" style:family="text">
      <style:text-properties officeooo:rsid="003612c9"/>
    </style:style>
    <style:style style:name="T12" style:family="text">
      <style:text-properties officeooo:rsid="00359746"/>
    </style:style>
    <style:style style:name="T13" style:family="text">
      <style:text-properties officeooo:rsid="00372ff2"/>
    </style:style>
    <style:style style:name="T14" style:family="text">
      <style:text-properties style:font-name="Calibri" officeooo:rsid="00308d62"/>
    </style:style>
    <style:style style:name="T15" style:family="text">
      <style:text-properties officeooo:rsid="0030e8b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ct :</text:p>
      <text:p text:style-name="P1">Replacement of my Boiler control station</text:p>
      <text:p text:style-name="P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2"><text:a xlink:type="simple" xlink:href="#__RefHeading___Toc2_1172820568" office:name="Objectives :" text:style-name="Index_20_Link" text:visited-style-name="Index_20_Link">Objectives :<text:tab/>2</text:a></text:p>
          <text:p text:style-name="P2"><text:a xlink:type="simple" xlink:href="#__RefHeading___Toc4_1172820568" office:name="High level Requirement :" text:style-name="Index_20_Link" text:visited-style-name="Index_20_Link">High level Requirement :<text:tab/>2</text:a></text:p>
          <text:p text:style-name="P2"><text:a xlink:type="simple" xlink:href="#__RefHeading___Toc74_1172820568" office:name="System Architecture" text:style-name="Index_20_Link" text:visited-style-name="Index_20_Link">System Architecture<text:tab/>3</text:a></text:p>
          <text:p text:style-name="P2"><text:a xlink:type="simple" xlink:href="#__RefHeading___Toc76_1172820568" office:name="Software Architecture" text:style-name="Index_20_Link" text:visited-style-name="Index_20_Link">Software Architecture<text:tab/>4</text:a></text:p>
          <text:p text:style-name="P2"><text:a xlink:type="simple" xlink:href="#__RefHeading___Toc125_1172820568" office:name="Hardware Architecture" text:style-name="Index_20_Link" text:visited-style-name="Index_20_Link">Hardware Architecture<text:tab/>5</text:a></text:p>
          <text:p text:style-name="P2"><text:a xlink:type="simple" xlink:href="#__RefHeading___Toc96_1172820568" office:name="Control Logic Architecture (Burner Activation Algorithm)" text:style-name="Index_20_Link" text:visited-style-name="Index_20_Link">Control Logic Architecture (Burner Activation Algorithm)<text:tab/>7</text:a></text:p>
          <text:p text:style-name="P2"><text:a xlink:type="simple" xlink:href="#__RefHeading___Toc227_1172820568" office:name="Data/Communication Architecture (Local -&gt; Web -&gt; Cloud)" text:style-name="Index_20_Link" text:visited-style-name="Index_20_Link">Data/Communication Architecture (Local -&gt; Web -&gt; Cloud)<text:tab/>8</text:a></text:p>
          <text:p text:style-name="P2"><text:a xlink:type="simple" xlink:href="#__RefHeading___Toc229_1172820568" office:name="Safety and Reliability" text:style-name="Index_20_Link" text:visited-style-name="Index_20_Link">Safety and Reliability<text:tab/>9</text:a></text:p>
        </text:index-body>
      </text:table-of-content>
      <text:p text:style-name="P3"/>
      <text:p text:style-name="P4"/>
      <text:h text:style-name="P5" text:outline-level="1"><text:bookmark-start text:name="__RefHeading___Toc2_1172820568"/>Objectives :<text:bookmark-end text:name="__RefHeading___Toc2_1172820568"/></text:h>
      <text:list text:style-name="L1">
        <text:list-item>
          <text:p text:style-name="P6">Replace the obsolescent Siemens PLC system with an embedded system based on Arduino R4 WiFi.</text:p>
        </text:list-item>
        <text:list-item>
          <text:p text:style-name="P7">Control the boiler in order to reduce consumption during night, summer and holidays </text:p>
        </text:list-item>
      </text:list>
      <text:p text:style-name="P3"/>
      <text:h text:style-name="P5" text:outline-level="1"><text:bookmark-start text:name="__RefHeading___Toc4_1172820568"/>High level Requirement :<text:bookmark-end text:name="__RefHeading___Toc4_1172820568"/></text:h>
      <text:p text:style-name="P3"/>
      <text:list xml:id="list3482814948" text:style-name="L2">
        <text:list-item>
          <text:p text:style-name="P8">Control the boiler using the following sensors and actuators </text:p>
        </text:list-item>
      </text:list>
      <text:list xml:id="list1926278469" text:style-name="L3">
        <text:list-item>
          <text:list>
            <text:list-item>
              <text:p text:style-name="P9">Outside temperature and humidity sensor</text:p>
            </text:list-item>
            <text:list-item>
              <text:p text:style-name="P9">Boiler water temperature sensor </text:p>
            </text:list-item>
            <text:list-item>
              <text:p text:style-name="P9">Home temperature and humidity sensor (Bluetooth communication)</text:p>
            </text:list-item>
            <text:list-item>
              <text:p text:style-name="P9">use current Water pump re-circulation from the old boiler (constant speed pump)</text:p>
            </text:list-item>
            <text:list-item>
              <text:p text:style-name="P9">water valve re-circulation to limit water flow in the heaters <text:s/>(stepper motor control)</text:p>
            </text:list-item>
            <text:list-item>
              <text:p text:style-name="P9">Pressure sensor to measure pump outlet pressure (system must operate between 1.8 bar and 3 bars) </text:p>
            </text:list-item>
            <text:list-item>
              <text:p text:style-name="P9">Fuel Burner activation </text:p>
            </text:list-item>
            <text:list-item>
              <text:p text:style-name="P9">System diagnostic</text:p>
              <text:list>
                <text:list-item>
                  <text:p text:style-name="P9">Boiler temperature (Freeze during burner operation)</text:p>
                </text:list-item>
                <text:list-item>
                  <text:p text:style-name="P9">Pump Pressure </text:p>
                </text:list-item>
                <text:list-item>
                  <text:p text:style-name="P9">Fuel burner operation time (maximum time operation) </text:p>
                </text:list-item>
              </text:list>
            </text:list-item>
          </text:list>
        </text:list-item>
      </text:list>
      <text:list text:continue-list="list3482814948" text:style-name="L2">
        <text:list-item>
          <text:p text:style-name="P8">Burner activation algorithm </text:p>
          <text:list>
            <text:list-item>
              <text:p text:style-name="P10">Based on the outside temperature and humidity, control the boiler water temperature </text:p>
            </text:list-item>
            <text:list-item>
              <text:p text:style-name="P10">Based on the home temperature, control the water valve re-circulation </text:p>
            </text:list-item>
            <text:list-item>
              <text:p text:style-name="P10">shut down the boiler and the water pump during night </text:p>
            </text:list-item>
            <text:list-item>
              <text:p text:style-name="P10">shut down the boiler <text:s/>and the water pump when outside temperature and inside temperature are above certain limits </text:p>
            </text:list-item>
          </text:list>
        </text:list-item>
        <text:list-item>
          <text:p text:style-name="P11">Control <text:s/>the boiler via a local server (first step) to <text:span text:style-name="T1">Display real time data</text:span> </text:p>
        </text:list-item>
        <text:list-item>
          <text:p text:style-name="P10">Control the boiler via a web server <text:span text:style-name="T2">(second step)</text:span>, Display real time data, <text:s/>and add cybersecurity protection (Login and Password)</text:p>
        </text:list-item>
        <text:list-item>
          <text:p text:style-name="P10">Store the boiler data on a cloud for furture analysis (use AWS services : free for a limited amout of data) </text:p>
          <text:list>
            <text:list-item>
              <text:p text:style-name="P10">All Temperature </text:p>
            </text:list-item>
            <text:list-item>
              <text:p text:style-name="P10">Water pump Pressure </text:p>
            </text:list-item>
            <text:list-item>
              <text:p text:style-name="P10">Burner activation time </text:p>
            </text:list-item>
          </text:list>
        </text:list-item>
        <text:list-item>
          <text:p text:style-name="P10">Developp an android application to control the boiler as a <text:span text:style-name="T2">third</text:span> step instead of the web server 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h text:style-name="P14" text:outline-level="1"><text:bookmark-start text:name="__RefHeading___Toc74_1172820568"/>System Architecture <text:bookmark-end text:name="__RefHeading___Toc74_1172820568"/></text:h>
      <text:p text:style-name="P15"/>
      <text:p text:style-name="P16">Sensors</text:p>
      <text:list text:continue-list="list1926278469" text:style-name="L4">
        <text:list-item>
          <text:p text:style-name="P17">Outside Temp/Humidity</text:p>
        </text:list-item>
        <text:list-item>
          <text:p text:style-name="P17">Boiler Water Temp</text:p>
        </text:list-item>
        <text:list-item>
          <text:p text:style-name="P17">Home Temp/Humidity (Bluetooth)</text:p>
        </text:list-item>
        <text:list-item>
          <text:p text:style-name="P17">Pump Outlet Pressure</text:p>
        </text:list-item>
      </text:list>
      <text:p text:style-name="P16">Controller Unit (Arduino UNO R4 WiFi + RTOS)]</text:p>
      <text:list text:continue-numbering="true" text:style-name="L4">
        <text:list-item>
          <text:p text:style-name="P17">IO acquisition + filtering</text:p>
        </text:list-item>
        <text:list-item>
          <text:p text:style-name="P17">Control algorithms (setpoints + state machine)</text:p>
        </text:list-item>
        <text:list-item>
          <text:p text:style-name="P17">Diagnostics + safety </text:p>
        </text:list-item>
      </text:list>
      <text:p text:style-name="P18"><text:span text:style-name="T3">Actuators</text:span> </text:p>
      <text:list xml:id="list121224157835073" text:continue-numbering="true" text:style-name="L4">
        <text:list-item>
          <text:p text:style-name="P17">Water pump recirculation (constant speed driver)</text:p>
        </text:list-item>
        <text:list-item>
          <text:p text:style-name="P17">Water recirculation valve (stepper motor driver)</text:p>
        </text:list-item>
        <text:list-item>
          <text:p text:style-name="P17">Fuel burner activation (burner relay/driver)</text:p>
        </text:list-item>
      </text:list>
      <text:p text:style-name="P18"/>
      <text:h text:style-name="P19" text:outline-level="1"><text:bookmark-start text:name="__RefHeading___Toc76_1172820568"/><text:span text:style-name="T4">Software</text:span> Architecture <text:bookmark-end text:name="__RefHeading___Toc76_1172820568"/></text:h>
      <text:p text:style-name="P20"><text:span text:style-name="T5">F</text:span>reeRTOS tasks with message passing (queues) and shared state guarded by mutex/critical sections:</text:p>
      <text:list xml:id="list121225008240563" text:continue-numbering="true" text:style-name="L4">
        <text:list-item>
          <text:p text:style-name="P21"><text:span text:style-name="Source_20_Text"><text:span text:style-name="T6">TaskSensorAcquisition </text:span></text:span><text:span text:style-name="Source_20_Text"><text:span text:style-name="T7">(3 tasks)</text:span></text:span></text:p>
          <text:list>
            <text:list-item>
              <text:p text:style-name="P22">Reads outside sensor, </text:p>
            </text:list-item>
            <text:list-item>
              <text:p text:style-name="P22"><text:span text:style-name="T8">Reads </text:span>boiler temp sensor, </text:p>
            </text:list-item>
            <text:list-item>
              <text:p text:style-name="P22"><text:span text:style-name="T8">Reads </text:span>pressure sensor</text:p>
            </text:list-item>
          </text:list>
        </text:list-item>
        <text:list-item>
          <text:p text:style-name="P21"><text:span text:style-name="Source_20_Text"><text:span text:style-name="T6">TaskHomeBluetoothIngestion </text:span></text:span></text:p>
          <text:list>
            <text:list-item>
              <text:p text:style-name="P17">Receives home temperature/humidity via Bluetooth module</text:p>
            </text:list-item>
          </text:list>
        </text:list-item>
        <text:list-item>
          <text:p text:style-name="P21"><text:span text:style-name="Source_20_Text"><text:span text:style-name="T7">T</text:span></text:span><text:span text:style-name="Source_20_Text"><text:span text:style-name="T6">askControlStateMachine</text:span></text:span></text:p>
          <text:list>
            <text:list-item>
              <text:p text:style-name="P21"><text:span text:style-name="T6">Computes setpoints and decides: </text:span><text:span text:style-name="Source_20_Text"><text:span text:style-name="T6">HEATING_ON / HEATING_OFF / NIGHT_SLEEP / LOCKOUT</text:span></text:span></text:p>
            </text:list-item>
            <text:list-item>
              <text:p text:style-name="P17">Enforces shutdown rules (night, over-temp limits, pressure limits)</text:p>
            </text:list-item>
          </text:list>
        </text:list-item>
        <text:list-item>
          <text:p text:style-name="P21"><text:span text:style-name="Source_20_Text"><text:span text:style-name="T6">TaskActuatorControl </text:span></text:span><text:span text:style-name="Source_20_Text"><text:span text:style-name="T7">(3 tasks)</text:span></text:span></text:p>
          <text:list>
            <text:list-item>
              <text:p text:style-name="P17">Controls pump (enable constant speed, stop on required shutdown)</text:p>
            </text:list-item>
            <text:list-item>
              <text:p text:style-name="P17">Controls stepper valve position (direction + stepped speed profile)</text:p>
            </text:list-item>
            <text:list-item>
              <text:p text:style-name="P17">Controls burner activation (enable/disable)</text:p>
            </text:list-item>
          </text:list>
        </text:list-item>
        <text:list-item>
          <text:p text:style-name="P21"><text:span text:style-name="Source_20_Text"><text:span text:style-name="T6">TaskDiagnostics </text:span></text:span><text:span text:style-name="Source_20_Text"><text:span text:style-name="T7">(2 tasks)</text:span></text:span></text:p>
          <text:list>
            <text:list-item>
              <text:p text:style-name="P17">Freeze/hold temperature reporting during burner operation (as required)</text:p>
            </text:list-item>
            <text:list-item>
              <text:p text:style-name="P17">Monitors: boiler temp, pump pressure, burner run time max limit</text:p>
            </text:list-item>
          </text:list>
        </text:list-item>
        <text:list-item>
          <text:p text:style-name="P21"><text:span text:style-name="Source_20_Text"><text:span text:style-name="T6">TaskLocalServer</text:span></text:span><text:span text:style-name="T6"> (Step 1) </text:span></text:p>
          <text:list>
            <text:list-item>
              <text:p text:style-name="P17">Serves real-time telemetry to a client</text:p>
            </text:list-item>
          </text:list>
        </text:list-item>
        <text:list-item>
          <text:p text:style-name="P23"><text:span text:style-name="T6"> </text:span><text:span text:style-name="Source_20_Text"><text:span text:style-name="T6">TaskWebServer</text:span></text:span><text:span text:style-name="T6"> (Step 2)</text:span></text:p>
          <text:list>
            <text:list-item>
              <text:p text:style-name="P24">Serves real-time telemetry to a client</text:p>
            </text:list-item>
          </text:list>
        </text:list-item>
        <text:list-item>
          <text:p text:style-name="P21"><text:span text:style-name="Source_20_Text"><text:span text:style-name="T6">TaskCloudLogger</text:span></text:span><text:span text:style-name="T6"> (Step </text:span><text:span text:style-name="T9">3</text:span><text:span text:style-name="T6">)</text:span></text:p>
          <text:list>
            <text:list-item>
              <text:p text:style-name="P17">Buffers data and uploads temperature/pressure/burner time</text:p>
            </text:list-item>
          </text:list>
        </text:list-item>
      </text:list>
      <text:p text:style-name="P18"/>
      <text:h text:style-name="P19" text:outline-level="1"><text:bookmark-start text:name="__RefHeading___Toc125_1172820568"/>Hardware Architecture <text:bookmark-end text:name="__RefHeading___Toc125_1172820568"/></text:h>
      <text:p text:style-name="P18"/>
      <text:list xml:id="list3026888955" text:style-name="L5">
        <text:list-item>
          <text:p text:style-name="P25"><text:span text:style-name="T10">S</text:span><text:span text:style-name="T3">ensors</text:span> </text:p>
        </text:list-item>
      </text:list>
      <text:list xml:id="list121225042552853" text:continue-list="list121225008240563" text:style-name="L4">
        <text:list-item>
          <text:p text:style-name="P17">Outside temperature &amp; humidity sensor</text:p>
          <text:list>
            <text:list-item>
              <text:p text:style-name="P17">DHT11 </text:p>
            </text:list-item>
            <text:list-item>
              <text:p text:style-name="P21"><text:span text:style-name="T6">Hardware interface : </text:span>proprietary single-bus <text:span text:style-name="T11">connected to Digital input on my arduino</text:span></text:p>
            </text:list-item>
          </text:list>
        </text:list-item>
        <text:list-item>
          <text:p text:style-name="P17">Boiler water temperature sensor</text:p>
          <text:list>
            <text:list-item>
              <text:p text:style-name="P17">NTC <text:span text:style-name="T12">connected to an Analog input </text:span><text:span text:style-name="T11">on my arduino</text:span></text:p>
            </text:list-item>
          </text:list>
        </text:list-item>
        <text:list-item>
          <text:p text:style-name="P17">Home temperature &amp; humidity sensor (Bluetooth)</text:p>
          <text:list>
            <text:list-item>
              <text:p text:style-name="P17">Xiaomi Mijia (LYWSD03MMC) :<text:span text:style-name="T12"> directly communicate with Ardduino R4</text:span></text:p>
            </text:list-item>
          </text:list>
        </text:list-item>
        <text:list-item>
          <text:p text:style-name="P17">Pump outlet pressure sensor (must operate 1.8 bar to 3 bar)</text:p>
          <text:list>
            <text:list-item>
              <text:p text:style-name="P17"><text:span text:style-name="T12">An</text:span>alog <text:span text:style-name="T12">input</text:span>:</text:p>
              <text:list>
                <text:list-item>
                  <text:p text:style-name="P17">0.5–4.5V to ADC</text:p>
                </text:list-item>
              </text:list>
            </text:list-item>
            <text:list-item>
              <text:p text:style-name="P17"><text:span text:style-name="T12">F</text:span>iltering (small RC), and ADC scaling to convert voltage to bar.</text:p>
            </text:list-item>
          </text:list>
        </text:list-item>
      </text:list>
      <text:p text:style-name="P26"/>
      <text:list xml:id="list121225444280317" text:continue-list="list3026888955" text:style-name="L5">
        <text:list-item>
          <text:p text:style-name="P27">Actuators and driver requirements </text:p>
        </text:list-item>
      </text:list>
      <text:list xml:id="list121223872488358" text:continue-list="list121225042552853" text:style-name="L4">
        <text:list-item>
          <text:p text:style-name="P17">Water pump recirculation (constant speed)</text:p>
          <text:list>
            <text:list-item>
              <text:p text:style-name="P17">Fotek SSR-25 DA (Solid State Relay) : <text:span text:style-name="T11">to be controlled by a DO of my arduino at 5V </text:span></text:p>
            </text:list-item>
          </text:list>
        </text:list-item>
        <text:list-item>
          <text:p text:style-name="P17">Water valve recirculation (stepper motor control)</text:p>
          <text:list>
            <text:list-item>
              <text:p text:style-name="P17">Stepper driver boardULN2003</text:p>
            </text:list-item>
            <text:list-item>
              <text:p text:style-name="P17">Arduino provides step/direction (or 4-phase coil signals depending on driver type).</text:p>
            </text:list-item>
          </text:list>
        </text:list-item>
        <text:list-item>
          <text:p text:style-name="P17">Fuel burner activation</text:p>
          <text:list>
            <text:list-item>
              <text:p text:style-name="P28">Fotek SSR-25 DA (Solid State Relay) : <text:span text:style-name="T11">to be controlled by a DO of my arduino at 5V</text:span></text:p>
            </text:list-item>
          </text:list>
        </text:list-item>
      </text:list>
      <text:list xml:id="list121224636957515" text:continue-list="list121225444280317" text:style-name="L5">
        <text:list-item>
          <text:p text:style-name="P27">Controller + power architecture </text:p>
        </text:list-item>
      </text:list>
      <text:list xml:id="list121224909878726" text:continue-list="list121223872488358" text:style-name="L4">
        <text:list-item>
          <text:p text:style-name="P17">Controller</text:p>
          <text:list>
            <text:list-item>
              <text:p text:style-name="P17">Arduino UNO R4 WiFi runs FreeRTOS tasks (sensing, control, diagnostics, networking).</text:p>
            </text:list-item>
          </text:list>
        </text:list-item>
        <text:list-item>
          <text:p text:style-name="P17">Power domains</text:p>
          <text:list>
            <text:list-item>
              <text:p text:style-name="P17">Logic power: 5V from your AC/DC converter.</text:p>
            </text:list-item>
            <text:list-item>
              <text:p text:style-name="P17"><text:span text:style-name="T13">Relay and stepper motor</text:span> power: separate supply for motors/driver relays </text:p>
            </text:list-item>
            <text:list-item>
              <text:p text:style-name="P17"><text:soft-page-break/>Grounding rule: tie grounds together between logic and actuator supplies </text:p>
            </text:list-item>
          </text:list>
        </text:list-item>
      </text:list>
      <text:list text:continue-list="list121224636957515" text:style-name="L5">
        <text:list-item>
          <text:p text:style-name="P27">Noise handling</text:p>
        </text:list-item>
      </text:list>
      <text:list xml:id="list121223832664817" text:continue-list="list121224909878726" text:style-name="L4">
        <text:list-item>
          <text:list>
            <text:list-item>
              <text:p text:style-name="P17"><text:span text:style-name="T13">M</text:span>otor driver bulk capacitors near the driver.</text:p>
            </text:list-item>
            <text:list-item>
              <text:p text:style-name="P17"><text:s/>RC filtering on analog sensor lines </text:p>
            </text:list-item>
            <text:list-item>
              <text:p text:style-name="P29">Route high-current traces away from sensor inputs; </text:p>
            </text:list-item>
            <text:list-item>
              <text:p text:style-name="P29">“dirty ground” (motor return) and “clean ground” (sensor return) joined at one point.</text:p>
            </text:list-item>
          </text:list>
        </text:list-item>
      </text:list>
      <text:p text:style-name="P18"/>
      <text:h text:style-name="P19" text:outline-level="1"><text:bookmark-start text:name="__RefHeading___Toc96_1172820568"/>Control Logic Architecture (Burner Activation Algorithm) <text:bookmark-end text:name="__RefHeading___Toc96_1172820568"/></text:h>
      <text:list xml:id="list121225183542685" text:continue-numbering="true" text:style-name="L4">
        <text:list-header>
          <text:p text:style-name="P17">Implement the heating controller as an explicit finite state machine for safety and clarity:</text:p>
        </text:list-header>
        <text:list-item>
          <text:p text:style-name="P17">States</text:p>
          <text:list>
            <text:list-item>
              <text:p text:style-name="P21"><text:span text:style-name="Source_20_Text"><text:span text:style-name="T6">IDLE</text:span></text:span><text:span text:style-name="T6"> (heating off, pump off or on depending on your recirculation policy)</text:span></text:p>
            </text:list-item>
            <text:list-item>
              <text:p text:style-name="P21"><text:span text:style-name="Source_20_Text"><text:span text:style-name="T6">RECIRCULATION_ONLY</text:span></text:span></text:p>
            </text:list-item>
            <text:list-item>
              <text:p text:style-name="P21"><text:span text:style-name="Source_20_Text"><text:span text:style-name="T6">BURNER_RUNNING</text:span></text:span></text:p>
            </text:list-item>
            <text:list-item>
              <text:p text:style-name="P21"><text:span text:style-name="Source_20_Text"><text:span text:style-name="T6">NIGHT_SLEEP</text:span></text:span><text:span text:style-name="T6"> (explicitly shut down boiler + water pump)</text:span></text:p>
            </text:list-item>
            <text:list-item>
              <text:p text:style-name="P21"><text:span text:style-name="Source_20_Text"><text:span text:style-name="T6">LOCKOUT</text:span></text:span><text:span text:style-name="T6"> (stay off until manual reset or conditions clear)</text:span></text:p>
            </text:list-item>
          </text:list>
        </text:list-item>
        <text:list-item>
          <text:p text:style-name="P17">Inputs used</text:p>
          <text:list>
            <text:list-item>
              <text:p text:style-name="P17">Outside temperature and humidity -&gt; compute desired boiler water temperature (setpoint)</text:p>
            </text:list-item>
            <text:list-item>
              <text:p text:style-name="P17">Home temperature -&gt; compute valve recirculation setting (stepper position)</text:p>
            </text:list-item>
            <text:list-item>
              <text:p text:style-name="P21"><text:span text:style-name="T6">Pressure sensor -&gt; must remain within </text:span><text:span text:style-name="Source_20_Text"><text:span text:style-name="T6">1.8 bar .. 3.0 bar</text:span></text:span></text:p>
            </text:list-item>
            <text:list-item>
              <text:p text:style-name="P17">Boiler temperature -&gt; freeze/diagnostics rules</text:p>
            </text:list-item>
            <text:list-item>
              <text:p text:style-name="P17">Burner run-time -&gt; maximum allowed operation time</text:p>
            </text:list-item>
          </text:list>
        </text:list-item>
        <text:list-item>
          <text:p text:style-name="P17">Rules (directly from your requirements)</text:p>
          <text:list>
            <text:list-item>
              <text:p text:style-name="P21"><text:span text:style-name="T6">Compute boiler setpoint from </text:span><text:span text:style-name="Source_20_Text"><text:span text:style-name="T6">outsideTemp/outsideHumidity</text:span></text:span></text:p>
            </text:list-item>
            <text:list-item>
              <text:p text:style-name="P21"><text:span text:style-name="T6">Compute valve recirculation from </text:span><text:span text:style-name="Source_20_Text"><text:span text:style-name="T6">homeTemp</text:span></text:span></text:p>
            </text:list-item>
            <text:list-item>
              <text:p text:style-name="P17">Shut down boiler and pump during night</text:p>
            </text:list-item>
            <text:list-item>
              <text:p text:style-name="P17">Shut down boiler and pump when:</text:p>
              <text:list>
                <text:list-item>
                  <text:p text:style-name="P17">outside temperature is above limit AND</text:p>
                </text:list-item>
                <text:list-item>
                  <text:p text:style-name="P17">inside temperature is above limit</text:p>
                </text:list-item>
              </text:list>
            </text:list-item>
            <text:list-item>
              <text:p text:style-name="P17">During burner operation:</text:p>
              <text:list>
                <text:list-item>
                  <text:p text:style-name="P17">enforce maximum burner time</text:p>
                </text:list-item>
                <text:list-item>
                  <text:p text:style-name="P17">apply diagnostics requirement: “freeze boiler temperature” while burner runs</text:p>
                </text:list-item>
              </text:list>
            </text:list-item>
            <text:list-item>
              <text:p text:style-name="P17">Pressure operating window enforcement:</text:p>
              <text:list>
                <text:list-item>
                  <text:p text:style-name="P21"><text:span text:style-name="T6">if pressure is outside </text:span><text:span text:style-name="Source_20_Text"><text:span text:style-name="T6">1.8..3.0 bar</text:span></text:span><text:span text:style-name="T6">, shut down burner and raise diagnostics</text:span></text:p>
                </text:list-item>
              </text:list>
            </text:list-item>
          </text:list>
        </text:list-item>
      </text:list>
      <text:p text:style-name="P18"/>
      <text:h text:style-name="P19" text:outline-level="1"><text:bookmark-start text:name="__RefHeading___Toc227_1172820568"/>Data/Communication Architecture (Local -&gt; Web -&gt; Cloud)<text:bookmark-end text:name="__RefHeading___Toc227_1172820568"/></text:h>
      <text:list text:continue-numbering="true" text:style-name="L4">
        <text:list-item>
          <text:p text:style-name="P17">Step 1: Local server (first)</text:p>
          <text:list>
            <text:list-item>
              <text:p text:style-name="P21"><text:span text:style-name="Source_20_Text"><text:span text:style-name="T6">TaskLocalServer</text:span></text:span><text:span text:style-name="T6"> e: <text:s/>a simple HTTP endpoint </text:span><text:span text:style-name="T14">f</text:span><text:span text:style-name="T6">or real-time data:</text:span></text:p>
              <text:list>
                <text:list-item>
                  <text:p text:style-name="P17">temps, pressure, burnerState, valvePosition, diagnostic flags</text:p>
                </text:list-item>
              </text:list>
            </text:list-item>
          </text:list>
        </text:list-item>
        <text:list-item>
          <text:p text:style-name="P30"><text:span text:style-name="T6">Step 2: Web server with cybersecurity</text:span></text:p>
          <text:list>
            <text:list-item>
              <text:p text:style-name="P21"><text:span text:style-name="Source_20_Text"><text:span text:style-name="T6">TaskWebServer</text:span></text:span><text:span text:style-name="T6"> :</text:span></text:p>
              <text:list>
                <text:list-item>
                  <text:p text:style-name="P17">Authentication (login + password)</text:p>
                </text:list-item>
                <text:list-item>
                  <text:p text:style-name="P17">Session/token handling</text:p>
                </text:list-item>
              </text:list>
            </text:list-item>
          </text:list>
        </text:list-item>
        <text:list-item>
          <text:p text:style-name="P21"><text:span text:style-name="T6">Step </text:span><text:span text:style-name="T14">3</text:span><text:span text:style-name="T6">: Cloud storage on AWS (future)</text:span></text:p>
          <text:list>
            <text:list-item>
              <text:p text:style-name="P17">AWS pattern:</text:p>
              <text:list>
                <text:list-item>
                  <text:p text:style-name="P17">Device publishes telemetry (HTTP or MQTT)</text:p>
                </text:list-item>
                <text:list-item>
                  <text:p text:style-name="P17">AWS services handle ingestion + storage + querying Possible AWS services (choose based on your preference):</text:p>
                </text:list-item>
                <text:list-item>
                  <text:p text:style-name="P17">IoT ingestion: AWS IoT Core (common for devices)</text:p>
                </text:list-item>
                <text:list-item>
                  <text:p text:style-name="P17">Storage:</text:p>
                  <text:list>
                    <text:list-item>
                      <text:p text:style-name="P17">time-series friendly: Timestream</text:p>
                    </text:list-item>
                  </text:list>
                </text:list-item>
                <text:list-item>
                  <text:p text:style-name="P17">Processing: Lambda for formatting/validation</text:p>
                </text:list-item>
                <text:list-item>
                  <text:p text:style-name="P31">Monitoring: CloudWatch logs/metrics</text:p>
                </text:list-item>
                <text:list-item>
                  <text:p text:style-name="P31">Telemetry to store :</text:p>
                  <text:list>
                    <text:list-item>
                      <text:p text:style-name="P17">All temperature values</text:p>
                    </text:list-item>
                    <text:list-item>
                      <text:p text:style-name="P17">Water pump pressure</text:p>
                    </text:list-item>
                    <text:list-item>
                      <text:p text:style-name="P17">Burner activation tim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"><text:span text:style-name="T6">Step </text:span><text:span text:style-name="T14">4</text:span><text:span text:style-name="T6">: Android application</text:span></text:p>
          <text:list>
            <text:list-item>
              <text:p text:style-name="P17">AWS-backed API </text:p>
            </text:list-item>
          </text:list>
        </text:list-item>
      </text:list>
      <text:p text:style-name="P18"/>
      <text:h text:style-name="P32" text:outline-level="1"><text:bookmark-start text:name="__RefHeading___Toc229_1172820568"/>Safety and Reliability <text:bookmark-end text:name="__RefHeading___Toc229_1172820568"/></text:h>
      <text:list text:style-name="L6">
        <text:list-item>
          <text:p text:style-name="P33">Hardware fail-safes </text:p>
          <text:list>
            <text:list-item>
              <text:p text:style-name="P33">relay cutoff <text:s/><text:span text:style-name="T15">based on boiler temperature </text:span></text:p>
            </text:list-item>
          </text:list>
        </text:list-item>
        <text:list-item>
          <text:p text:style-name="P34">Pressure out-of-range triggers a safe shutdown path immediately.</text:p>
        </text:list-item>
        <text:list-item>
          <text:p text:style-name="P34">Burner run-time max limit is enforced even if sensors temporarily fail.</text:p>
        </text:list-item>
        <text:list-item>
          <text:p text:style-name="P34"><text:s/><text:span text:style-name="T15">F</text:span>iltering on noisy sensors and sanity checks (e.g., reject impossible pressure or temperature readings).</text:p>
        </text:list-item>
        <text:list-item>
          <text:p text:style-name="P35">Actuator tasks must include “command timeouts” </text:p>
        </text:list-item>
      </text:list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3T09:47:18.784311700</meta:creation-date>
    <meta:generator>LibreOffice/26.2.1.2$Windows_X86_64 LibreOffice_project/620$Build-2</meta:generator>
    <dc:date>2026-04-03T11:27:37.809728600</dc:date>
    <meta:editing-duration>PT51M7S</meta:editing-duration>
    <meta:editing-cycles>20</meta:editing-cycles>
    <meta:print-date>2026-04-03T12:02:48.408128600</meta:print-date>
    <meta:printed-by>Fichiers PDF</meta:printed-by>
    <meta:document-statistic meta:table-count="0" meta:image-count="0" meta:object-count="0" meta:page-count="9" meta:paragraph-count="166" meta:word-count="1177" meta:character-count="7435" meta:non-whitespace-character-count="6517"/>
  </office:meta>
</office:document-meta>
</file>