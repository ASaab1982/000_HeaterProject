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Google Sans Flex" svg:font-family="Google Sans Flex" style:font-family-generic="system"/>
    <style:font-face style:name="Consolas, 'Courier New', monosp" svg:font-family="Consolas, 'Courier New', monosp" style:font-family-generic="system"/>
    <style:font-face style:name="Arial" svg:font-family="Arial" style:font-family-generic="swiss" style:font-pitch="variable" svg:panose-1="2 11 6 4 2 2 2 2 2 4"/>
    <style:font-face style:name="Segoe WPC" svg:font-family="Segoe WPC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bullet text:level="1" text:style-name="WW_CharLFO6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bullet text:level="1" text:style-name="WW_CharLFO12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6LVL2" text:bullet-char="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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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T3" style:parent-style-name="Policepardéfaut" style:family="text">
      <style:text-properties fo:font-weight="bold" style:font-weight-asian="bold" fo:background-color="#FFFF00"/>
    </style:style>
    <style:style style:name="T4" style:parent-style-name="Policepardéfaut" style:family="text">
      <style:text-properties fo:background-color="#FFFF00"/>
    </style:style>
    <style:style style:name="T5" style:parent-style-name="Policepardéfaut" style:family="text">
      <style:text-properties fo:font-weight="bold" style:font-weight-asian="bold" fo:background-color="#FFFF00"/>
    </style:style>
    <style:style style:name="T6" style:parent-style-name="Policepardéfaut" style:family="text">
      <style:text-properties fo:background-color="#FFFF00"/>
    </style:style>
    <style:style style:name="T7" style:parent-style-name="Policepardéfaut" style:family="text">
      <style:text-properties fo:font-weight="bold" style:font-weight-asian="bold"/>
    </style:style>
    <style:style style:name="P8" style:parent-style-name="Textbody" style:family="paragraph"/>
    <style:style style:name="T9" style:parent-style-name="Policepardéfaut" style:family="text">
      <style:text-properties fo:font-weight="bold" style:font-weight-asian="bold"/>
    </style:style>
    <style:style style:name="P10" style:parent-style-name="Textbody" style:family="paragraph"/>
    <style:style style:name="T11" style:parent-style-name="Policepardéfaut" style:family="text">
      <style:text-properties fo:font-weight="bold" style:font-weight-asian="bold"/>
    </style:style>
    <style:style style:name="T12" style:parent-style-name="Policepardéfaut" style:family="text">
      <style:text-properties fo:font-weight="bold" style:font-weight-asian="bold"/>
    </style:style>
    <style:style style:name="P13" style:parent-style-name="Textbody" style:family="paragraph"/>
    <style:style style:name="T14" style:parent-style-name="Policepardéfaut" style:family="text">
      <style:text-properties fo:font-weight="bold" style:font-weight-asian="bold"/>
    </style:style>
    <style:style style:name="P15" style:parent-style-name="Textbody" style:family="paragraph"/>
    <style:style style:name="T16" style:parent-style-name="Policepardéfaut" style:family="text">
      <style:text-properties fo:font-weight="bold" style:font-weight-asian="bold"/>
    </style:style>
    <style:style style:name="T17" style:parent-style-name="Policepardéfaut" style:family="text">
      <style:text-properties fo:font-style="italic" style:font-style-asian="italic"/>
    </style:style>
    <style:style style:name="P18" style:parent-style-name="Textbody" style:family="paragraph"/>
    <style:style style:name="T19" style:parent-style-name="Policepardéfaut" style:family="text">
      <style:text-properties fo:font-weight="bold" style:font-weight-asian="bold"/>
    </style:style>
    <style:style style:name="P20" style:parent-style-name="Textbody" style:family="paragraph"/>
    <style:style style:name="T21" style:parent-style-name="Policepardéfaut" style:family="text">
      <style:text-properties fo:font-weight="bold" style:font-weight-asian="bold"/>
    </style:style>
    <style:style style:name="T22" style:parent-style-name="Policepardéfaut" style:family="text">
      <style:text-properties fo:font-weight="bold" style:font-weight-asian="bold"/>
    </style:style>
    <style:style style:name="P23" style:parent-style-name="Textbody" style:family="paragraph"/>
    <style:style style:name="T24" style:parent-style-name="Policepardéfaut" style:family="text">
      <style:text-properties fo:font-weight="bold" style:font-weight-asian="bold"/>
    </style:style>
    <style:style style:name="T25" style:parent-style-name="Policepardéfaut" style:family="text">
      <style:text-properties fo:font-weight="bold" style:font-weight-asian="bold"/>
    </style:style>
    <style:style style:name="T26" style:parent-style-name="Policepardéfaut" style:family="text">
      <style:text-properties fo:font-style="italic" style:font-style-asian="italic"/>
    </style:style>
    <style:style style:name="T27" style:parent-style-name="Policepardéfaut" style:family="text">
      <style:text-properties fo:font-weight="bold" style:font-weight-asian="bold"/>
    </style:style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T31" style:parent-style-name="Policepardéfaut" style:family="text">
      <style:text-properties fo:font-weight="bold" style:font-weight-asian="bold"/>
    </style:style>
    <style:style style:name="P32" style:parent-style-name="Textbody" style:family="paragraph"/>
    <style:style style:name="T33" style:parent-style-name="Policepardéfaut" style:family="text">
      <style:text-properties fo:font-weight="bold" style:font-weight-asian="bold"/>
    </style:style>
    <style:style style:name="T34" style:parent-style-name="Policepardéfaut" style:family="text">
      <style:text-properties fo:font-weight="bold" style:font-weight-asian="bold"/>
    </style:style>
    <style:style style:name="P35" style:parent-style-name="Textbody" style:family="paragraph"/>
    <style:style style:name="T36" style:parent-style-name="Policepardéfaut" style:family="text">
      <style:text-properties fo:font-weight="bold" style:font-weight-asian="bold"/>
    </style:style>
    <style:style style:name="T37" style:parent-style-name="Policepardéfaut" style:family="text">
      <style:text-properties fo:font-weight="bold" style:font-weight-asian="bold"/>
    </style:style>
    <style:style style:name="P38" style:parent-style-name="Textbody" style:family="paragraph"/>
    <style:style style:name="T39" style:parent-style-name="Policepardéfaut" style:family="text">
      <style:text-properties fo:font-weight="bold" style:font-weight-asian="bold"/>
    </style:style>
    <style:style style:name="T40" style:parent-style-name="Policepardéfaut" style:family="text">
      <style:text-properties fo:font-weight="bold" style:font-weight-asian="bold"/>
    </style:style>
    <style:style style:name="P41" style:parent-style-name="Textbody" style:family="paragraph"/>
    <style:style style:name="T42" style:parent-style-name="Policepardéfaut" style:family="text">
      <style:text-properties fo:font-weight="bold" style:font-weight-asian="bold"/>
    </style:style>
    <style:style style:name="T43" style:parent-style-name="Policepardéfaut" style:family="text">
      <style:text-properties fo:font-weight="bold" style:font-weight-asian="bold"/>
    </style:style>
    <style:style style:name="P44" style:parent-style-name="Textbody" style:family="paragraph">
      <style:paragraph-properties fo:break-before="page"/>
    </style:style>
    <style:style style:name="T45" style:parent-style-name="Policepardéfaut" style:family="text">
      <style:text-properties style:font-name="Google Sans Flex" fo:color="#1F1F1F" fo:background-color="#FFBF00"/>
    </style:style>
    <style:style style:name="P46" style:parent-style-name="Textbody" style:family="paragraph">
      <style:paragraph-properties fo:margin-bottom="0.1666in" fo:line-height="175%"/>
      <style:text-properties style:font-name="Google Sans Flex"/>
    </style:style>
    <style:style style:name="S1" style:family="section">
      <style:section-properties fo:margin-left="0in" fo:margin-right="0in" style:writing-mode="lr-tb"/>
    </style:style>
    <style:style style:name="P47" style:parent-style-name="HorizontalLine" style:family="paragraph">
      <style:paragraph-properties fo:margin-bottom="0.0972in" fo:line-height="175%"/>
    </style:style>
    <style:style style:name="P48" style:parent-style-name="Titre2" style:family="paragraph">
      <style:paragraph-properties fo:margin-top="0.2916in" style:line-height-at-least="0.2916in"/>
      <style:text-properties style:font-name="Google Sans Flex" fo:font-size="15pt" style:font-size-asian="15pt"/>
    </style:style>
    <style:style style:name="P49" style:parent-style-name="Textbody" style:family="paragraph">
      <style:paragraph-properties fo:margin-bottom="0.1666in" fo:line-height="175%"/>
    </style:style>
    <style:style style:name="T50" style:parent-style-name="Policepardéfaut" style:family="text">
      <style:text-properties style:font-name="Google Sans Flex"/>
    </style:style>
    <style:style style:name="T51" style:parent-style-name="Policepardéfaut" style:family="text">
      <style:text-properties style:font-name="Google Sans Flex" fo:font-weight="bold" style:font-weight-asian="bold"/>
    </style:style>
    <style:style style:name="T52" style:parent-style-name="Policepardéfaut" style:family="text">
      <style:text-properties style:font-name="Google Sans Flex"/>
    </style:style>
    <style:style style:name="P53" style:parent-style-name="Titre3" style:family="paragraph">
      <style:paragraph-properties fo:margin-top="0.2916in" style:line-height-at-least="0.25in"/>
      <style:text-properties style:font-name="Google Sans Flex" fo:font-size="12pt" style:font-size-asian="12pt"/>
    </style:style>
    <style:style style:name="P54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55" style:parent-style-name="Policepardéfaut" style:family="text">
      <style:text-properties style:font-name="Google Sans Flex" fo:font-weight="bold" style:font-weight-asian="bold"/>
    </style:style>
    <style:style style:name="T56" style:parent-style-name="Policepardéfaut" style:family="text">
      <style:text-properties style:font-name="Google Sans Flex"/>
    </style:style>
    <style:style style:name="T57" style:parent-style-name="Policepardéfaut" style:family="text">
      <style:text-properties style:font-name="Google Sans Flex" fo:font-weight="bold" style:font-weight-asian="bold"/>
    </style:style>
    <style:style style:name="T58" style:parent-style-name="Policepardéfaut" style:family="text">
      <style:text-properties style:font-name="Google Sans Flex"/>
    </style:style>
    <style:style style:name="P59" style:parent-style-name="Textbody" style:family="paragraph">
      <style:paragraph-properties fo:margin-top="0.0833in" fo:margin-bottom="0.0833in" style:line-height-at-least="0.2083in" fo:margin-left="0in" fo:text-indent="0in">
        <style:tab-stops/>
      </style:paragraph-properties>
    </style:style>
    <style:style style:name="T60" style:parent-style-name="Policepardéfaut" style:family="text">
      <style:text-properties style:font-name="Google Sans Flex" fo:font-weight="bold" style:font-weight-asian="bold"/>
    </style:style>
    <style:style style:name="T61" style:parent-style-name="Policepardéfaut" style:family="text">
      <style:text-properties style:font-name="Google Sans Flex"/>
    </style:style>
    <style:style style:name="T62" style:parent-style-name="SourceText" style:family="text">
      <style:text-properties style:font-name="Google Sans Flex" fo:font-size="10.5pt" style:font-size-asian="10.5pt"/>
    </style:style>
    <style:style style:name="T63" style:parent-style-name="Policepardéfaut" style:family="text">
      <style:text-properties style:font-name="Google Sans Flex"/>
    </style:style>
    <style:style style:name="T64" style:parent-style-name="Policepardéfaut" style:family="text">
      <style:text-properties style:font-name="Google Sans Flex" fo:font-weight="bold" style:font-weight-asian="bold"/>
    </style:style>
    <style:style style:name="T65" style:parent-style-name="Policepardéfaut" style:family="text">
      <style:text-properties style:font-name="Google Sans Flex"/>
    </style:style>
    <style:style style:name="P66" style:parent-style-name="Textbody" style:family="paragraph">
      <style:paragraph-properties fo:margin-top="0.0833in" fo:margin-bottom="0.0833in" style:line-height-at-least="0.2083in" fo:margin-left="0in" fo:text-indent="0in">
        <style:tab-stops/>
      </style:paragraph-properties>
    </style:style>
    <style:style style:name="T67" style:parent-style-name="Policepardéfaut" style:family="text">
      <style:text-properties style:font-name="Google Sans Flex" fo:font-weight="bold" style:font-weight-asian="bold"/>
    </style:style>
    <style:style style:name="T68" style:parent-style-name="Policepardéfaut" style:family="text">
      <style:text-properties style:font-name="Google Sans Flex"/>
    </style:style>
    <style:style style:name="T69" style:parent-style-name="Policepardéfaut" style:family="text">
      <style:text-properties style:font-name="Google Sans Flex" fo:font-weight="bold" style:font-weight-asian="bold"/>
    </style:style>
    <style:style style:name="T70" style:parent-style-name="Policepardéfaut" style:family="text">
      <style:text-properties style:font-name="Google Sans Flex"/>
    </style:style>
    <style:style style:name="T71" style:parent-style-name="Policepardéfaut" style:family="text">
      <style:text-properties style:font-name="Google Sans Flex" fo:font-weight="bold" style:font-weight-asian="bold"/>
    </style:style>
    <style:style style:name="T72" style:parent-style-name="Policepardéfaut" style:family="text">
      <style:text-properties style:font-name="Google Sans Flex"/>
    </style:style>
    <style:style style:name="T73" style:parent-style-name="SourceText" style:family="text">
      <style:text-properties style:font-name="Google Sans Flex" fo:font-size="10.5pt" style:font-size-asian="10.5pt"/>
    </style:style>
    <style:style style:name="T74" style:parent-style-name="Policepardéfaut" style:family="text">
      <style:text-properties style:font-name="Google Sans Flex"/>
    </style:style>
    <style:style style:name="T75" style:parent-style-name="SourceText" style:family="text">
      <style:text-properties style:font-name="Google Sans Flex" fo:font-size="10.5pt" style:font-size-asian="10.5pt"/>
    </style:style>
    <style:style style:name="T76" style:parent-style-name="Policepardéfaut" style:family="text">
      <style:text-properties style:font-name="Google Sans Flex"/>
    </style:style>
    <style:style style:name="P77" style:parent-style-name="Titre3" style:family="paragraph">
      <style:paragraph-properties fo:margin-top="0.2916in" style:line-height-at-least="0.25in"/>
      <style:text-properties style:font-name="Google Sans Flex" fo:font-size="12pt" style:font-size-asian="12pt"/>
    </style:style>
    <style:style style:name="P78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79" style:parent-style-name="Policepardéfaut" style:family="text">
      <style:text-properties style:font-name="Google Sans Flex" fo:font-weight="bold" style:font-weight-asian="bold"/>
    </style:style>
    <style:style style:name="T80" style:parent-style-name="Policepardéfaut" style:family="text">
      <style:text-properties style:font-name="Google Sans Flex"/>
    </style:style>
    <style:style style:name="T81" style:parent-style-name="Policepardéfaut" style:family="text">
      <style:text-properties style:font-name="Google Sans Flex" fo:font-weight="bold" style:font-weight-asian="bold"/>
    </style:style>
    <style:style style:name="T82" style:parent-style-name="Policepardéfaut" style:family="text">
      <style:text-properties style:font-name="Google Sans Flex"/>
    </style:style>
    <style:style style:name="P83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84" style:parent-style-name="Policepardéfaut" style:family="text">
      <style:text-properties style:font-name="Google Sans Flex" fo:font-weight="bold" style:font-weight-asian="bold"/>
    </style:style>
    <style:style style:name="T85" style:parent-style-name="Policepardéfaut" style:family="text">
      <style:text-properties style:font-name="Google Sans Flex"/>
    </style:style>
    <style:style style:name="T86" style:parent-style-name="Policepardéfaut" style:family="text">
      <style:text-properties style:font-name="Google Sans Flex" fo:font-weight="bold" style:font-weight-asian="bold"/>
    </style:style>
    <style:style style:name="T87" style:parent-style-name="Policepardéfaut" style:family="text">
      <style:text-properties style:font-name="Google Sans Flex"/>
    </style:style>
    <style:style style:name="T88" style:parent-style-name="Policepardéfaut" style:family="text">
      <style:text-properties style:font-name="Google Sans Flex" fo:font-weight="bold" style:font-weight-asian="bold"/>
    </style:style>
    <style:style style:name="T89" style:parent-style-name="Policepardéfaut" style:family="text">
      <style:text-properties style:font-name="Google Sans Flex"/>
    </style:style>
    <style:style style:name="P90" style:parent-style-name="HorizontalLine" style:family="paragraph">
      <style:paragraph-properties fo:margin-bottom="0.0972in" fo:line-height="175%"/>
    </style:style>
    <style:style style:name="P91" style:parent-style-name="Titre2" style:family="paragraph">
      <style:paragraph-properties fo:margin-top="0.2916in" style:line-height-at-least="0.2916in"/>
      <style:text-properties style:font-name="Google Sans Flex" fo:font-size="15pt" style:font-size-asian="15pt"/>
    </style:style>
    <style:style style:name="P92" style:parent-style-name="Textbody" style:family="paragraph">
      <style:paragraph-properties fo:margin-bottom="0.1666in" fo:line-height="175%"/>
      <style:text-properties style:font-name="Google Sans Flex"/>
    </style:style>
    <style:style style:name="P93" style:parent-style-name="Titre3" style:family="paragraph">
      <style:paragraph-properties fo:margin-top="0.2916in" style:line-height-at-least="0.25in"/>
      <style:text-properties style:font-name="Google Sans Flex" fo:font-size="12pt" style:font-size-asian="12pt"/>
    </style:style>
    <style:style style:name="P94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95" style:parent-style-name="Policepardéfaut" style:family="text">
      <style:text-properties style:font-name="Google Sans Flex" fo:font-weight="bold" style:font-weight-asian="bold"/>
    </style:style>
    <style:style style:name="T96" style:parent-style-name="Policepardéfaut" style:family="text">
      <style:text-properties style:font-name="Google Sans Flex"/>
    </style:style>
    <style:style style:name="P97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98" style:parent-style-name="Policepardéfaut" style:family="text">
      <style:text-properties style:font-name="Google Sans Flex" fo:font-weight="bold" style:font-weight-asian="bold"/>
    </style:style>
    <style:style style:name="T99" style:parent-style-name="Policepardéfaut" style:family="text">
      <style:text-properties style:font-name="Google Sans Flex"/>
    </style:style>
    <style:style style:name="P100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01" style:parent-style-name="Policepardéfaut" style:family="text">
      <style:text-properties style:font-name="Google Sans Flex" fo:font-weight="bold" style:font-weight-asian="bold"/>
    </style:style>
    <style:style style:name="T102" style:parent-style-name="Policepardéfaut" style:family="text">
      <style:text-properties style:font-name="Google Sans Flex"/>
    </style:style>
    <style:style style:name="P103" style:parent-style-name="Titre3" style:family="paragraph">
      <style:paragraph-properties fo:margin-top="0.2916in" style:line-height-at-least="0.25in"/>
      <style:text-properties style:font-name="Google Sans Flex" fo:font-size="12pt" style:font-size-asian="12pt"/>
    </style:style>
    <style:style style:name="P104" style:parent-style-name="Textbody" style:family="paragraph">
      <style:paragraph-properties fo:margin-bottom="0.0833in" style:line-height-at-least="0.2083in"/>
    </style:style>
    <style:style style:name="T105" style:parent-style-name="Policepardéfaut" style:family="text">
      <style:text-properties style:font-name="Google Sans Flex"/>
    </style:style>
    <style:style style:name="T106" style:parent-style-name="SourceText" style:family="text">
      <style:text-properties style:font-name="Google Sans Flex" fo:font-size="10.5pt" style:font-size-asian="10.5pt"/>
    </style:style>
    <style:style style:name="T107" style:parent-style-name="Policepardéfaut" style:family="text">
      <style:text-properties style:font-name="Google Sans Flex"/>
    </style:style>
    <style:style style:name="P108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09" style:parent-style-name="Policepardéfaut" style:family="text">
      <style:text-properties style:font-name="Google Sans Flex" fo:font-weight="bold" style:font-weight-asian="bold"/>
    </style:style>
    <style:style style:name="T110" style:parent-style-name="Policepardéfaut" style:family="text">
      <style:text-properties style:font-name="Google Sans Flex"/>
    </style:style>
    <style:style style:name="T111" style:parent-style-name="Policepardéfaut" style:family="text">
      <style:text-properties style:font-name="Google Sans Flex" fo:font-weight="bold" style:font-weight-asian="bold"/>
    </style:style>
    <style:style style:name="T112" style:parent-style-name="Policepardéfaut" style:family="text">
      <style:text-properties style:font-name="Google Sans Flex"/>
    </style:style>
    <style:style style:name="P113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14" style:parent-style-name="Policepardéfaut" style:family="text">
      <style:text-properties style:font-name="Google Sans Flex" fo:font-weight="bold" style:font-weight-asian="bold"/>
    </style:style>
    <style:style style:name="T115" style:parent-style-name="Policepardéfaut" style:family="text">
      <style:text-properties style:font-name="Google Sans Flex"/>
    </style:style>
    <style:style style:name="P116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17" style:parent-style-name="Policepardéfaut" style:family="text">
      <style:text-properties style:font-name="Google Sans Flex" fo:font-weight="bold" style:font-weight-asian="bold"/>
    </style:style>
    <style:style style:name="T118" style:parent-style-name="Policepardéfaut" style:family="text">
      <style:text-properties style:font-name="Google Sans Flex"/>
    </style:style>
    <style:style style:name="P119" style:parent-style-name="Titre3" style:family="paragraph">
      <style:paragraph-properties fo:margin-top="0.2916in" style:line-height-at-least="0.25in"/>
      <style:text-properties style:font-name="Google Sans Flex" fo:font-size="12pt" style:font-size-asian="12pt"/>
    </style:style>
    <style:style style:name="P120" style:parent-style-name="Textbody" style:family="paragraph">
      <style:paragraph-properties fo:margin-bottom="0.1666in" style:line-height-at-least="0.2083in"/>
    </style:style>
    <style:style style:name="T121" style:parent-style-name="Policepardéfaut" style:family="text">
      <style:text-properties style:font-name="Google Sans Flex"/>
    </style:style>
    <style:style style:name="T122" style:parent-style-name="Policepardéfaut" style:family="text">
      <style:text-properties style:font-name="Google Sans Flex" fo:font-weight="bold" style:font-weight-asian="bold"/>
    </style:style>
    <style:style style:name="T123" style:parent-style-name="Policepardéfaut" style:family="text">
      <style:text-properties style:font-name="Google Sans Flex"/>
    </style:style>
    <style:style style:name="T124" style:parent-style-name="Policepardéfaut" style:family="text">
      <style:text-properties style:font-name="Google Sans Flex" fo:font-weight="bold" style:font-weight-asian="bold"/>
    </style:style>
    <style:style style:name="T125" style:parent-style-name="Policepardéfaut" style:family="text">
      <style:text-properties style:font-name="Google Sans Flex"/>
    </style:style>
    <style:style style:name="T126" style:parent-style-name="SourceText" style:family="text">
      <style:text-properties style:font-name="Google Sans Flex" fo:font-size="10.5pt" style:font-size-asian="10.5pt"/>
    </style:style>
    <style:style style:name="T127" style:parent-style-name="Policepardéfaut" style:family="text">
      <style:text-properties style:font-name="Google Sans Flex"/>
    </style:style>
    <style:style style:name="T128" style:parent-style-name="SourceText" style:family="text">
      <style:text-properties style:font-name="Google Sans Flex" fo:font-size="10.5pt" style:font-size-asian="10.5pt"/>
    </style:style>
    <style:style style:name="T129" style:parent-style-name="Policepardéfaut" style:family="text">
      <style:text-properties style:font-name="Google Sans Flex"/>
    </style:style>
    <style:style style:name="P130" style:parent-style-name="HorizontalLine" style:family="paragraph">
      <style:paragraph-properties fo:margin-bottom="0.0972in" fo:line-height="175%"/>
    </style:style>
    <style:style style:name="P131" style:parent-style-name="Titre2" style:family="paragraph">
      <style:paragraph-properties fo:margin-top="0.2916in" style:line-height-at-least="0.2916in"/>
      <style:text-properties style:font-name="Google Sans Flex" fo:font-size="15pt" style:font-size-asian="15pt"/>
    </style:style>
    <style:style style:name="P132" style:parent-style-name="Textbody" style:family="paragraph">
      <style:paragraph-properties fo:margin-bottom="0.1666in" fo:line-height="120%"/>
    </style:style>
    <style:style style:name="T133" style:parent-style-name="Policepardéfaut" style:family="text">
      <style:text-properties style:font-name="Google Sans Flex"/>
    </style:style>
    <style:style style:name="T134" style:parent-style-name="Policepardéfaut" style:family="text">
      <style:text-properties style:font-name="Google Sans Flex" fo:font-weight="bold" style:font-weight-asian="bold"/>
    </style:style>
    <style:style style:name="T135" style:parent-style-name="Policepardéfaut" style:family="text">
      <style:text-properties style:font-name="Google Sans Flex"/>
    </style:style>
    <style:style style:name="P136" style:parent-style-name="Titre3" style:family="paragraph">
      <style:paragraph-properties fo:margin-top="0.2916in" style:line-height-at-least="0.25in"/>
      <style:text-properties style:font-name="Google Sans Flex" fo:font-size="12pt" style:font-size-asian="12pt"/>
    </style:style>
    <style:style style:name="P137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38" style:parent-style-name="Policepardéfaut" style:family="text">
      <style:text-properties style:font-name="Google Sans Flex" fo:font-weight="bold" style:font-weight-asian="bold"/>
    </style:style>
    <style:style style:name="T139" style:parent-style-name="Policepardéfaut" style:family="text">
      <style:text-properties style:font-name="Google Sans Flex"/>
    </style:style>
    <style:style style:name="T140" style:parent-style-name="Policepardéfaut" style:family="text">
      <style:text-properties style:font-name="Google Sans Flex" fo:font-weight="bold" style:font-weight-asian="bold"/>
    </style:style>
    <style:style style:name="T141" style:parent-style-name="Policepardéfaut" style:family="text">
      <style:text-properties style:font-name="Google Sans Flex"/>
    </style:style>
    <style:style style:name="T142" style:parent-style-name="Policepardéfaut" style:family="text">
      <style:text-properties style:font-name="Google Sans Flex" fo:font-weight="bold" style:font-weight-asian="bold"/>
    </style:style>
    <style:style style:name="T143" style:parent-style-name="Policepardéfaut" style:family="text">
      <style:text-properties style:font-name="Google Sans Flex"/>
    </style:style>
    <style:style style:name="T144" style:parent-style-name="Policepardéfaut" style:family="text">
      <style:text-properties style:font-name="Google Sans Flex" fo:font-weight="bold" style:font-weight-asian="bold"/>
    </style:style>
    <style:style style:name="T145" style:parent-style-name="Policepardéfaut" style:family="text">
      <style:text-properties style:font-name="Google Sans Flex"/>
    </style:style>
    <style:style style:name="P146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47" style:parent-style-name="Policepardéfaut" style:family="text">
      <style:text-properties style:font-name="Google Sans Flex" fo:font-weight="bold" style:font-weight-asian="bold"/>
    </style:style>
    <style:style style:name="T148" style:parent-style-name="Policepardéfaut" style:family="text">
      <style:text-properties style:font-name="Google Sans Flex"/>
    </style:style>
    <style:style style:name="P149" style:parent-style-name="Titre3" style:family="paragraph">
      <style:paragraph-properties fo:margin-top="0.2916in" style:line-height-at-least="0.25in"/>
      <style:text-properties style:font-name="Google Sans Flex" fo:font-size="12pt" style:font-size-asian="12pt"/>
    </style:style>
    <style:style style:name="P150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51" style:parent-style-name="Policepardéfaut" style:family="text">
      <style:text-properties style:font-name="Google Sans Flex" fo:font-weight="bold" style:font-weight-asian="bold"/>
    </style:style>
    <style:style style:name="T152" style:parent-style-name="Policepardéfaut" style:family="text">
      <style:text-properties style:font-name="Google Sans Flex"/>
    </style:style>
    <style:style style:name="P153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54" style:parent-style-name="Policepardéfaut" style:family="text">
      <style:text-properties style:font-name="Google Sans Flex" fo:font-weight="bold" style:font-weight-asian="bold"/>
    </style:style>
    <style:style style:name="T155" style:parent-style-name="Policepardéfaut" style:family="text">
      <style:text-properties style:font-name="Google Sans Flex"/>
    </style:style>
    <style:style style:name="T156" style:parent-style-name="Policepardéfaut" style:family="text">
      <style:text-properties style:font-name="Google Sans Flex" fo:font-weight="bold" style:font-weight-asian="bold"/>
    </style:style>
    <style:style style:name="T157" style:parent-style-name="Policepardéfaut" style:family="text">
      <style:text-properties style:font-name="Google Sans Flex"/>
    </style:style>
    <style:style style:name="P158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59" style:parent-style-name="Policepardéfaut" style:family="text">
      <style:text-properties style:font-name="Google Sans Flex" fo:font-weight="bold" style:font-weight-asian="bold"/>
    </style:style>
    <style:style style:name="T160" style:parent-style-name="Policepardéfaut" style:family="text">
      <style:text-properties style:font-name="Google Sans Flex"/>
    </style:style>
    <style:style style:name="T161" style:parent-style-name="Policepardéfaut" style:family="text">
      <style:text-properties style:font-name="Google Sans Flex" fo:font-weight="bold" style:font-weight-asian="bold"/>
    </style:style>
    <style:style style:name="T162" style:parent-style-name="Policepardéfaut" style:family="text">
      <style:text-properties style:font-name="Google Sans Flex"/>
    </style:style>
    <style:style style:name="P163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64" style:parent-style-name="Policepardéfaut" style:family="text">
      <style:text-properties style:font-name="Google Sans Flex" fo:font-weight="bold" style:font-weight-asian="bold"/>
    </style:style>
    <style:style style:name="T165" style:parent-style-name="Policepardéfaut" style:family="text">
      <style:text-properties style:font-name="Google Sans Flex"/>
    </style:style>
    <style:style style:name="T166" style:parent-style-name="Policepardéfaut" style:family="text">
      <style:text-properties style:font-name="Google Sans Flex" fo:font-weight="bold" style:font-weight-asian="bold"/>
    </style:style>
    <style:style style:name="T167" style:parent-style-name="Policepardéfaut" style:family="text">
      <style:text-properties style:font-name="Google Sans Flex"/>
    </style:style>
    <style:style style:name="P168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69" style:parent-style-name="Policepardéfaut" style:family="text">
      <style:text-properties style:font-name="Google Sans Flex" fo:font-weight="bold" style:font-weight-asian="bold"/>
    </style:style>
    <style:style style:name="T170" style:parent-style-name="Policepardéfaut" style:family="text">
      <style:text-properties style:font-name="Google Sans Flex"/>
    </style:style>
    <style:style style:name="P171" style:parent-style-name="Titre3" style:family="paragraph">
      <style:paragraph-properties fo:margin-top="0.2916in" style:line-height-at-least="0.25in"/>
      <style:text-properties style:font-name="Google Sans Flex" fo:font-size="12pt" style:font-size-asian="12pt"/>
    </style:style>
    <style:style style:name="P172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73" style:parent-style-name="Policepardéfaut" style:family="text">
      <style:text-properties style:font-name="Google Sans Flex" fo:font-weight="bold" style:font-weight-asian="bold"/>
    </style:style>
    <style:style style:name="T174" style:parent-style-name="Policepardéfaut" style:family="text">
      <style:text-properties style:font-name="Google Sans Flex"/>
    </style:style>
    <style:style style:name="P175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76" style:parent-style-name="Policepardéfaut" style:family="text">
      <style:text-properties style:font-name="Google Sans Flex" fo:font-weight="bold" style:font-weight-asian="bold"/>
    </style:style>
    <style:style style:name="T177" style:parent-style-name="Policepardéfaut" style:family="text">
      <style:text-properties style:font-name="Google Sans Flex"/>
    </style:style>
    <style:style style:name="T178" style:parent-style-name="Policepardéfaut" style:family="text">
      <style:text-properties style:font-name="Google Sans Flex" fo:font-weight="bold" style:font-weight-asian="bold"/>
    </style:style>
    <style:style style:name="T179" style:parent-style-name="Policepardéfaut" style:family="text">
      <style:text-properties style:font-name="Google Sans Flex"/>
    </style:style>
    <style:style style:name="P180" style:parent-style-name="Textbody" style:family="paragraph">
      <style:paragraph-properties fo:margin-top="0.0833in" fo:margin-bottom="0.0833in" fo:line-height="175%" fo:margin-left="0in" fo:text-indent="0in">
        <style:tab-stops/>
      </style:paragraph-properties>
    </style:style>
    <style:style style:name="T181" style:parent-style-name="Policepardéfaut" style:family="text">
      <style:text-properties style:font-name="Google Sans Flex" fo:font-weight="bold" style:font-weight-asian="bold"/>
    </style:style>
    <style:style style:name="T182" style:parent-style-name="Policepardéfaut" style:family="text">
      <style:text-properties style:font-name="Google Sans Flex"/>
    </style:style>
    <style:style style:name="T183" style:parent-style-name="Policepardéfaut" style:family="text">
      <style:text-properties style:font-name="Google Sans Flex" fo:font-weight="bold" style:font-weight-asian="bold"/>
    </style:style>
    <style:style style:name="T184" style:parent-style-name="Policepardéfaut" style:family="text">
      <style:text-properties style:font-name="Google Sans Flex"/>
    </style:style>
    <style:style style:name="T185" style:parent-style-name="Policepardéfaut" style:family="text">
      <style:text-properties style:font-name="Google Sans Flex" fo:font-weight="bold" style:font-weight-asian="bold"/>
    </style:style>
    <style:style style:name="T186" style:parent-style-name="Policepardéfaut" style:family="text">
      <style:text-properties style:font-name="Google Sans Flex"/>
    </style:style>
    <style:style style:name="S2" style:family="section">
      <style:section-properties fo:margin-left="0in" fo:margin-right="0in" style:writing-mode="lr-tb"/>
    </style:style>
    <style:style style:name="P187" style:parent-style-name="Textbody" style:family="paragraph">
      <style:paragraph-properties fo:break-before="page"/>
      <style:text-properties fo:background-color="#FFBF00"/>
    </style:style>
    <style:style style:name="P188" style:parent-style-name="Textbody" style:family="paragraph">
      <style:paragraph-properties fo:line-height="140%"/>
    </style:style>
    <style:style style:name="T189" style:parent-style-name="SourceText" style:family="text">
      <style:text-properties style:font-name="Consolas, 'Courier New', monosp"/>
    </style:style>
    <style:style style:name="T190" style:parent-style-name="SourceText" style:family="text">
      <style:text-properties style:font-name="Consolas, 'Courier New', monosp"/>
    </style:style>
    <style:style style:name="P191" style:parent-style-name="HorizontalLine" style:family="paragraph">
      <style:paragraph-properties fo:margin-bottom="0.0972in" fo:line-height="115%"/>
    </style:style>
    <style:style style:name="P192" style:parent-style-name="Titre3" style:family="paragraph">
      <style:paragraph-properties fo:margin-top="0in" fo:margin-bottom="0.0972in" fo:line-height="115%"/>
    </style:style>
    <style:style style:name="P193" style:parent-style-name="Textbody" style:family="paragraph">
      <style:paragraph-properties fo:margin-bottom="0in" fo:line-height="140%" fo:margin-left="0in" fo:text-indent="0in">
        <style:tab-stops/>
      </style:paragraph-properties>
    </style:style>
    <style:style style:name="T194" style:parent-style-name="SourceText" style:family="text">
      <style:text-properties style:font-name="Arial" style:font-name-asian="Arial" style:font-name-complex="Arial"/>
    </style:style>
    <style:style style:name="P195" style:parent-style-name="Textbody" style:family="paragraph">
      <style:paragraph-properties fo:margin-bottom="0in" fo:line-height="140%" fo:margin-left="0in" fo:text-indent="0in">
        <style:tab-stops/>
      </style:paragraph-properties>
    </style:style>
    <style:style style:name="T196" style:parent-style-name="SourceText" style:family="text">
      <style:text-properties style:font-name="Arial" style:font-name-asian="Arial" style:font-name-complex="Arial"/>
    </style:style>
    <style:style style:name="P197" style:parent-style-name="Textbody" style:family="paragraph">
      <style:paragraph-properties fo:line-height="140%" fo:margin-left="0in" fo:text-indent="0in">
        <style:tab-stops/>
      </style:paragraph-properties>
    </style:style>
    <style:style style:name="T198" style:parent-style-name="SourceText" style:family="text">
      <style:text-properties style:font-name="Arial" style:font-name-asian="Arial" style:font-name-complex="Arial"/>
    </style:style>
    <style:style style:name="P199" style:parent-style-name="Textbody" style:family="paragraph">
      <style:paragraph-properties fo:margin-bottom="0in" fo:line-height="140%" fo:margin-left="0in" fo:text-indent="0in">
        <style:tab-stops/>
      </style:paragraph-properties>
    </style:style>
    <style:style style:name="T200" style:parent-style-name="SourceText" style:family="text">
      <style:text-properties style:font-name="Consolas, 'Courier New', monosp"/>
    </style:style>
    <style:style style:name="T201" style:parent-style-name="SourceText" style:family="text">
      <style:text-properties style:font-name="Consolas, 'Courier New', monosp"/>
    </style:style>
    <style:style style:name="P202" style:parent-style-name="Textbody" style:family="paragraph">
      <style:paragraph-properties fo:margin-bottom="0in" fo:line-height="140%" fo:margin-left="0in" fo:text-indent="0in">
        <style:tab-stops/>
      </style:paragraph-properties>
    </style:style>
    <style:style style:name="T203" style:parent-style-name="SourceText" style:family="text">
      <style:text-properties style:font-name="Consolas, 'Courier New', monosp"/>
    </style:style>
    <style:style style:name="T204" style:parent-style-name="SourceText" style:family="text">
      <style:text-properties style:font-name="Consolas, 'Courier New', monosp"/>
    </style:style>
    <style:style style:name="T205" style:parent-style-name="SourceText" style:family="text">
      <style:text-properties style:font-name="Consolas, 'Courier New', monosp"/>
    </style:style>
    <style:style style:name="P206" style:parent-style-name="Textbody" style:family="paragraph">
      <style:paragraph-properties fo:line-height="140%" fo:margin-left="0in" fo:text-indent="0in">
        <style:tab-stops/>
      </style:paragraph-properties>
    </style:style>
    <style:style style:name="T207" style:parent-style-name="SourceText" style:family="text">
      <style:text-properties style:font-name="Consolas, 'Courier New', monosp"/>
    </style:style>
    <style:style style:name="P208" style:parent-style-name="HorizontalLine" style:family="paragraph">
      <style:paragraph-properties fo:margin-bottom="0.0972in" fo:line-height="115%"/>
    </style:style>
    <style:style style:name="P209" style:parent-style-name="Titre3" style:family="paragraph">
      <style:paragraph-properties fo:margin-top="0in" fo:margin-bottom="0.0972in" fo:line-height="115%"/>
    </style:style>
    <style:style style:name="P210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11" style:parent-style-name="Textbody" style:family="paragraph">
      <style:paragraph-properties style:line-height-at-least="0.2083in"/>
      <style:text-properties style:font-name="Consolas, 'Courier New', monosp" fo:font-size="9pt" style:font-size-asian="9pt" fo:background-color="#181818"/>
    </style:style>
    <style:style style:name="P212" style:parent-style-name="Textbody" style:family="paragraph">
      <style:paragraph-properties fo:margin-bottom="0in" fo:line-height="140%" fo:margin-left="0in" fo:text-indent="0in">
        <style:tab-stops/>
      </style:paragraph-properties>
    </style:style>
    <style:style style:name="T213" style:parent-style-name="SourceText" style:family="text">
      <style:text-properties style:font-name="Consolas, 'Courier New', monosp"/>
    </style:style>
    <style:style style:name="P214" style:parent-style-name="Textbody" style:family="paragraph">
      <style:paragraph-properties fo:line-height="140%" fo:margin-left="0in" fo:text-indent="0in">
        <style:tab-stops/>
      </style:paragraph-properties>
    </style:style>
    <style:style style:name="T215" style:parent-style-name="SourceText" style:family="text">
      <style:text-properties style:font-name="Consolas, 'Courier New', monosp"/>
    </style:style>
    <style:style style:name="P216" style:parent-style-name="HorizontalLine" style:family="paragraph">
      <style:paragraph-properties fo:margin-bottom="0.0972in" fo:line-height="115%"/>
    </style:style>
    <style:style style:name="P217" style:parent-style-name="Titre3" style:family="paragraph">
      <style:paragraph-properties fo:margin-top="0in" fo:margin-bottom="0.0972in" fo:line-height="115%"/>
    </style:style>
    <style:style style:name="P218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19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20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21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22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23" style:parent-style-name="Textbody" style:family="paragraph">
      <style:paragraph-properties style:line-height-at-least="0.2083in"/>
      <style:text-properties style:font-name="Consolas, 'Courier New', monosp" fo:font-size="9pt" style:font-size-asian="9pt" fo:background-color="#181818"/>
    </style:style>
    <style:style style:name="P224" style:parent-style-name="HorizontalLine" style:family="paragraph">
      <style:paragraph-properties fo:margin-bottom="0.0972in" fo:line-height="115%"/>
    </style:style>
    <style:style style:name="P225" style:parent-style-name="Titre3" style:family="paragraph">
      <style:paragraph-properties fo:margin-top="0in" fo:margin-bottom="0.0972in" fo:line-height="115%"/>
    </style:style>
    <style:style style:name="P226" style:parent-style-name="Textbody" style:family="paragraph">
      <style:paragraph-properties fo:margin-bottom="0in" fo:margin-left="0in" fo:text-indent="0in">
        <style:tab-stops/>
      </style:paragraph-properties>
    </style:style>
    <style:style style:name="P227" style:parent-style-name="Textbody" style:family="paragraph">
      <style:paragraph-properties fo:margin-bottom="0in" fo:margin-left="0in" fo:text-indent="0in">
        <style:tab-stops/>
      </style:paragraph-properties>
    </style:style>
    <style:style style:name="P228" style:parent-style-name="Textbody" style:family="paragraph">
      <style:paragraph-properties fo:margin-bottom="0in" fo:margin-left="0in" fo:text-indent="0in">
        <style:tab-stops/>
      </style:paragraph-properties>
    </style:style>
    <style:style style:name="P229" style:parent-style-name="Textbody" style:family="paragraph">
      <style:paragraph-properties fo:margin-bottom="0in" fo:margin-left="0in" fo:text-indent="0in">
        <style:tab-stops/>
      </style:paragraph-properties>
    </style:style>
    <style:style style:name="P230" style:parent-style-name="Textbody" style:family="paragraph">
      <style:paragraph-properties fo:margin-bottom="0in" fo:margin-left="0in" fo:text-indent="0in">
        <style:tab-stops/>
      </style:paragraph-properties>
    </style:style>
    <style:style style:name="P231" style:parent-style-name="Textbody" style:family="paragraph">
      <style:paragraph-properties fo:margin-top="0.0625in" fo:margin-bottom="0in" fo:line-height="140%" fo:margin-left="0in" fo:text-indent="0in">
        <style:tab-stops/>
      </style:paragraph-properties>
    </style:style>
    <style:style style:name="T232" style:parent-style-name="SourceText" style:family="text">
      <style:text-properties style:font-name="Consolas, 'Courier New', monosp"/>
    </style:style>
    <style:style style:name="P233" style:parent-style-name="Textbody" style:family="paragraph">
      <style:paragraph-properties fo:margin-top="0.0625in" fo:margin-bottom="0in" fo:line-height="140%" fo:margin-left="0in" fo:text-indent="0in">
        <style:tab-stops/>
      </style:paragraph-properties>
    </style:style>
    <style:style style:name="T234" style:parent-style-name="SourceText" style:family="text">
      <style:text-properties style:font-name="Consolas, 'Courier New', monosp"/>
    </style:style>
    <style:style style:name="P235" style:parent-style-name="Textbody" style:family="paragraph">
      <style:paragraph-properties fo:margin-top="0.0625in" fo:margin-bottom="0in" fo:line-height="140%" fo:margin-left="0in" fo:text-indent="0in">
        <style:tab-stops/>
      </style:paragraph-properties>
    </style:style>
    <style:style style:name="T236" style:parent-style-name="SourceText" style:family="text">
      <style:text-properties style:font-name="Consolas, 'Courier New', monosp"/>
    </style:style>
    <style:style style:name="P237" style:parent-style-name="Textbody" style:family="paragraph">
      <style:paragraph-properties fo:margin-left="0in" fo:text-indent="0in">
        <style:tab-stops/>
      </style:paragraph-properties>
    </style:style>
    <style:style style:name="P238" style:parent-style-name="Textbody" style:family="paragraph">
      <style:paragraph-properties fo:line-height="140%" fo:margin-left="0in" fo:text-indent="0in">
        <style:tab-stops/>
      </style:paragraph-properties>
    </style:style>
    <style:style style:name="T239" style:parent-style-name="SourceText" style:family="text">
      <style:text-properties style:font-name="Consolas, 'Courier New', monosp"/>
    </style:style>
    <style:style style:name="P240" style:parent-style-name="Textbody" style:family="paragraph">
      <style:paragraph-properties fo:margin-bottom="0in" fo:line-height="140%" fo:margin-left="0in" fo:text-indent="0in">
        <style:tab-stops/>
      </style:paragraph-properties>
    </style:style>
    <style:style style:name="T241" style:parent-style-name="SourceText" style:family="text">
      <style:text-properties style:font-name="Consolas, 'Courier New', monosp"/>
    </style:style>
    <style:style style:name="P242" style:parent-style-name="Textbody" style:family="paragraph">
      <style:paragraph-properties fo:line-height="140%" fo:margin-left="0in" fo:text-indent="0in">
        <style:tab-stops/>
      </style:paragraph-properties>
    </style:style>
    <style:style style:name="T243" style:parent-style-name="SourceText" style:family="text">
      <style:text-properties style:font-name="Consolas, 'Courier New', monosp"/>
    </style:style>
    <style:style style:name="P244" style:parent-style-name="HorizontalLine" style:family="paragraph">
      <style:paragraph-properties fo:margin-bottom="0.0972in" fo:line-height="115%"/>
    </style:style>
    <style:style style:name="P245" style:parent-style-name="Titre3" style:family="paragraph">
      <style:paragraph-properties fo:margin-top="0in" fo:margin-bottom="0.0972in" fo:line-height="115%"/>
    </style:style>
    <style:style style:name="P246" style:parent-style-name="Textbody" style:family="paragraph">
      <style:paragraph-properties fo:margin-bottom="0in" fo:line-height="140%" fo:margin-left="0in" fo:text-indent="0in">
        <style:tab-stops/>
      </style:paragraph-properties>
    </style:style>
    <style:style style:name="T247" style:parent-style-name="SourceText" style:family="text">
      <style:text-properties style:font-name="Consolas, 'Courier New', monosp"/>
    </style:style>
    <style:style style:name="T248" style:parent-style-name="SourceText" style:family="text">
      <style:text-properties style:font-name="Consolas, 'Courier New', monosp"/>
    </style:style>
    <style:style style:name="T249" style:parent-style-name="SourceText" style:family="text">
      <style:text-properties style:font-name="Consolas, 'Courier New', monosp"/>
    </style:style>
    <style:style style:name="P250" style:parent-style-name="Textbody" style:family="paragraph">
      <style:paragraph-properties fo:line-height="140%" fo:margin-left="0in" fo:text-indent="0in">
        <style:tab-stops/>
      </style:paragraph-properties>
    </style:style>
    <style:style style:name="T251" style:parent-style-name="SourceText" style:family="text">
      <style:text-properties style:font-name="Consolas, 'Courier New', monosp"/>
    </style:style>
    <style:style style:name="T252" style:parent-style-name="SourceText" style:family="text">
      <style:text-properties style:font-name="Consolas, 'Courier New', monosp"/>
    </style:style>
    <style:style style:name="P253" style:parent-style-name="HorizontalLine" style:family="paragraph">
      <style:paragraph-properties fo:margin-bottom="0.0972in" fo:line-height="115%"/>
    </style:style>
    <style:style style:name="P254" style:parent-style-name="Titre3" style:family="paragraph">
      <style:paragraph-properties fo:margin-top="0in" fo:margin-bottom="0.0972in" fo:line-height="115%"/>
    </style:style>
    <style:style style:name="P255" style:parent-style-name="Textbody" style:family="paragraph">
      <style:paragraph-properties fo:margin-bottom="0in" fo:line-height="140%" fo:margin-left="0in" fo:text-indent="0in">
        <style:tab-stops/>
      </style:paragraph-properties>
    </style:style>
    <style:style style:name="T256" style:parent-style-name="SourceText" style:family="text">
      <style:text-properties style:font-name="Consolas, 'Courier New', monosp"/>
    </style:style>
    <style:style style:name="P257" style:parent-style-name="Textbody" style:family="paragraph">
      <style:paragraph-properties fo:margin-bottom="0in" fo:margin-left="0in" fo:text-indent="0in">
        <style:tab-stops/>
      </style:paragraph-properties>
    </style:style>
    <style:style style:name="P258" style:parent-style-name="Textbody" style:family="paragraph">
      <style:paragraph-properties fo:margin-top="0.0625in" fo:margin-bottom="0in" fo:line-height="140%" fo:margin-left="0in" fo:text-indent="0in">
        <style:tab-stops/>
      </style:paragraph-properties>
    </style:style>
    <style:style style:name="T259" style:parent-style-name="SourceText" style:family="text">
      <style:text-properties style:font-name="Consolas, 'Courier New', monosp"/>
    </style:style>
    <style:style style:name="P260" style:parent-style-name="Textbody" style:family="paragraph">
      <style:paragraph-properties fo:margin-top="0.0625in" fo:margin-bottom="0.1965in" fo:line-height="140%" fo:margin-left="0in" fo:text-indent="0in">
        <style:tab-stops/>
      </style:paragraph-properties>
    </style:style>
    <style:style style:name="T261" style:parent-style-name="SourceText" style:family="text">
      <style:text-properties style:font-name="Consolas, 'Courier New', monosp"/>
    </style:style>
    <style:style style:name="P262" style:parent-style-name="HorizontalLine" style:family="paragraph">
      <style:paragraph-properties fo:margin-bottom="0.0972in" fo:line-height="115%"/>
    </style:style>
    <style:style style:name="P263" style:parent-style-name="Titre3" style:family="paragraph">
      <style:paragraph-properties fo:margin-top="0in" fo:margin-bottom="0.0972in" fo:line-height="115%"/>
    </style:style>
    <style:style style:name="P264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65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66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67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68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69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70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71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72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73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74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75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76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77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78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79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80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81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82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83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84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85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86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87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88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89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90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91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92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93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94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95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96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97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98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299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300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301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302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303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304" style:parent-style-name="Textbody" style:family="paragraph">
      <style:paragraph-properties fo:margin-bottom="0in" style:line-height-at-least="0.2083in"/>
      <style:text-properties style:font-name="Consolas, 'Courier New', monosp" fo:font-size="9pt" style:font-size-asian="9pt" fo:background-color="#181818"/>
    </style:style>
    <style:style style:name="P305" style:parent-style-name="HorizontalLine" style:family="paragraph">
      <style:paragraph-properties fo:margin-bottom="0.0972in" fo:line-height="115%"/>
    </style:style>
    <style:style style:name="P306" style:parent-style-name="Titre3" style:family="paragraph">
      <style:paragraph-properties fo:margin-top="0in" fo:margin-bottom="0.0972in" fo:line-height="115%"/>
    </style:style>
    <style:style style:name="P307" style:parent-style-name="Textbody" style:family="paragraph">
      <style:paragraph-properties fo:margin-bottom="0in" fo:line-height="140%" fo:margin-left="0in" fo:text-indent="0in">
        <style:tab-stops/>
      </style:paragraph-properties>
    </style:style>
    <style:style style:name="T308" style:parent-style-name="SourceText" style:family="text">
      <style:text-properties style:font-name="Consolas, 'Courier New', monosp"/>
    </style:style>
    <style:style style:name="P309" style:parent-style-name="Textbody" style:family="paragraph">
      <style:paragraph-properties fo:margin-bottom="0in" fo:line-height="140%" fo:margin-left="0in" fo:text-indent="0in">
        <style:tab-stops/>
      </style:paragraph-properties>
    </style:style>
    <style:style style:name="T310" style:parent-style-name="SourceText" style:family="text">
      <style:text-properties style:font-name="Consolas, 'Courier New', monosp"/>
    </style:style>
    <style:style style:name="T311" style:parent-style-name="SourceText" style:family="text">
      <style:text-properties style:font-name="Consolas, 'Courier New', monosp"/>
    </style:style>
    <style:style style:name="P312" style:parent-style-name="Textbody" style:family="paragraph">
      <style:paragraph-properties fo:margin-left="0in" fo:text-indent="0in">
        <style:tab-stops/>
      </style:paragraph-properties>
    </style:style>
    <style:style style:name="P313" style:parent-style-name="HorizontalLine" style:family="paragraph">
      <style:paragraph-properties fo:margin-bottom="0.0972in" fo:line-height="115%"/>
    </style:style>
    <style:style style:name="P314" style:parent-style-name="Titre2" style:family="paragraph">
      <style:paragraph-properties fo:margin-top="0in" fo:margin-bottom="0.0972in" fo:line-height="115%"/>
    </style:style>
    <style:style style:name="P315" style:parent-style-name="Textbody" style:family="paragraph">
      <style:paragraph-properties fo:margin-bottom="0in" fo:line-height="140%" fo:margin-left="0in" fo:text-indent="0in">
        <style:tab-stops/>
      </style:paragraph-properties>
    </style:style>
    <style:style style:name="T316" style:parent-style-name="SourceText" style:family="text">
      <style:text-properties style:font-name="Consolas, 'Courier New', monosp"/>
    </style:style>
    <style:style style:name="P317" style:parent-style-name="Textbody" style:family="paragraph">
      <style:paragraph-properties fo:margin-bottom="0in" fo:margin-left="0in" fo:text-indent="0in">
        <style:tab-stops/>
      </style:paragraph-properties>
    </style:style>
    <style:style style:name="P318" style:parent-style-name="Textbody" style:family="paragraph">
      <style:paragraph-properties fo:margin-left="0in" fo:text-indent="0in">
        <style:tab-stops/>
      </style:paragraph-properties>
    </style:style>
    <style:style style:name="P319" style:parent-style-name="HorizontalLine" style:family="paragraph">
      <style:paragraph-properties fo:margin-bottom="0.0972in" fo:line-height="115%"/>
    </style:style>
    <style:style style:name="P320" style:parent-style-name="Textbody" style:family="paragraph">
      <style:paragraph-properties fo:margin-top="0.0625in" fo:margin-bottom="0in"/>
      <style:text-properties style:font-name="Segoe WPC" fo:font-size="9.5pt" style:font-size-asian="9.5pt"/>
    </style:style>
    <style:style style:name="P321" style:parent-style-name="Textbody" style:family="paragraph">
      <style:paragraph-properties fo:margin-top="0.0625in" fo:margin-bottom="0in"/>
      <style:text-properties style:font-name="Segoe WPC" fo:font-size="9.5pt" style:font-size-asian="9.5pt"/>
    </style:style>
    <style:style style:name="P322" style:parent-style-name="Textbody" style:family="paragraph">
      <style:paragraph-properties fo:margin-top="0.0625in" fo:margin-bottom="0in" fo:line-height="140%"/>
    </style:style>
    <style:style style:name="T323" style:parent-style-name="Policepardéfaut" style:family="text">
      <style:text-properties style:font-name="Segoe WPC" fo:font-size="9.5pt" style:font-size-asian="9.5pt"/>
    </style:style>
    <style:style style:name="T324" style:parent-style-name="SourceText" style:family="text">
      <style:text-properties style:font-name="Consolas, 'Courier New', monosp" fo:font-size="9.5pt" style:font-size-asian="9.5pt"/>
    </style:style>
    <style:style style:name="T325" style:parent-style-name="Policepardéfaut" style:family="text">
      <style:text-properties style:font-name="Segoe WPC" fo:font-size="9.5pt" style:font-size-asian="9.5pt"/>
    </style:style>
    <style:style style:name="T326" style:parent-style-name="SourceText" style:family="text">
      <style:text-properties style:font-name="Consolas, 'Courier New', monosp" fo:font-size="9.5pt" style:font-size-asian="9.5pt"/>
    </style:style>
    <style:style style:name="T327" style:parent-style-name="Policepardéfaut" style:family="text">
      <style:text-properties style:font-name="Segoe WPC" fo:font-size="9.5pt" style:font-size-asian="9.5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-content" style:horizontal-pos="from-left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-content" style:horizontal-pos="from-left" style:vertical-pos="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This is a classic "IoT Architecture" shift. You are moving from a<text:s/></text:span><text:span text:style-name="T3">Local Server</text:span><text:span text:style-name="T4"><text:s/>(Arduino does everything) to a<text:s/></text:span><text:span text:style-name="T5">Cloud-Client Model</text:span><text:span text:style-name="T6"><text:s/>(Arduino is just a worker, and the web page lives on a professional server).</text:span></text:p>
      <text:p text:style-name="Textbody">Since your Arduino is now a "Receiver" instead of a "Host," the logic changes. Here are the steps to set this up:</text:p>
      <text:p text:style-name="HorizontalLine"/>
      <text:h text:style-name="Titre3" text:outline-level="3">Step 1: Host the HTML on a Web Platform</text:h>
      <text:p text:style-name="Textbody">Instead of the Arduino "reciting" the HTML from its memory, you put your<text:s/><text:span text:style-name="SourceText">.html</text:span><text:s/>file on a service like<text:s/><text:span text:style-name="T7">GitHub Pages, Netlify, or Vercel</text:span><text:s/>(which are often free).</text:p>
      <text:list text:style-name="LFO1" text:continue-numbering="true">
        <text:list-item>
          <text:p text:style-name="P8"><text:span text:style-name="T9">The File:</text:span><text:s/>Your HTML will now contain a JavaScript "Fetch" command.</text:p>
        </text:list-item>
        <text:list-item>
          <text:p text:style-name="P10"><text:span text:style-name="T11">The Button:</text:span><text:s/>When clicked, the button doesn't ask the server for a new page; it sends a tiny "data packet" (a Request) directly to your Arduino's IP address.</text:p>
        </text:list-item>
      </text:list>
      <text:p text:style-name="HorizontalLine"/>
      <text:h text:style-name="Titre3" text:outline-level="3">Step 2: The "CORS" Challenge (Important!)</text:h>
      <text:p text:style-name="Textbody">Browsers have a security feature called<text:s/><text:span text:style-name="T12">CORS</text:span><text:s/>(Cross-Origin Resource Sharing).</text:p>
      <text:list text:style-name="LFO2" text:continue-numbering="true">
        <text:list-item>
          <text:p text:style-name="P13"><text:span text:style-name="T14">The Problem:</text:span><text:s/>If your website is at<text:s/><text:span text:style-name="SourceText">myproject.netlify.app</text:span>, the browser will block it from talking to a random IP address like<text:s/><text:span text:style-name="SourceText">192.168.1.20</text:span><text:s/>for security.</text:p>
        </text:list-item>
        <text:list-item>
          <text:p text:style-name="P15"><text:span text:style-name="T16">The Fix:</text:span><text:s/>In your Arduino code, you must add a specific "Permission" line in the HTTP header to tell the browser:<text:s/><text:span text:style-name="T17">"It's okay, I trust this website."</text:span></text:p>
          <text:list text:continue-numbering="true">
            <text:list-item>
              <text:p text:style-name="P18"><text:span text:style-name="SourceText">client.println("Access-Control-Allow-Origin: *");</text:span></text:p>
            </text:list-item>
          </text:list>
        </text:list-item>
      </text:list>
      <text:p text:style-name="HorizontalLine"/>
      <text:h text:style-name="Titre3" text:outline-level="3">Step 3: Making the Arduino Reachable (Port Forwarding)</text:h>
      <text:p text:style-name="Textbody">This is the trickiest part. If your HTML is on the "Real Internet" (the Cloud), it cannot see your Arduino because your home Router acts as a<text:s/><text:span text:style-name="T19">Shield</text:span>.</text:p>
      <text:list text:style-name="LFO3" text:continue-numbering="true">
        <text:list-item>
          <text:p text:style-name="P20"><text:span text:style-name="T21">Local vs. Global:</text:span><text:s/>Your Arduino has a local IP (e.g.,<text:s/><text:span text:style-name="SourceText">192.168.1.20</text:span>), but the internet only sees your<text:s/><text:span text:style-name="T22">Public IP</text:span>.</text:p>
        </text:list-item>
        <text:list-item>
          <text:p text:style-name="P23"><text:span text:style-name="T24">The Solution:</text:span><text:s/>You must go into your Router settings and set up<text:s/><text:span text:style-name="T25">Port Forwarding</text:span>. You tell the router:<text:s/><text:span text:style-name="T26">"If any request comes from the internet on Port 80, send it straight to the Arduino at 192.168.1.20."</text:span></text:p>
        </text:list-item>
      </text:list>
      <text:p text:style-name="HorizontalLine"/>
      <text:h text:style-name="Titre3" text:outline-level="3">Step 4: Update the Arduino Code (The "Listener")</text:h>
      <text:p text:style-name="Textbody">You can keep most of your current code, but you<text:s/><text:span text:style-name="T27">delete</text:span><text:s/>all the lines that print the HTML (the<text:s/><text:span text:style-name="SourceText">&lt;style&gt;</text:span>,<text:s/><text:span text:style-name="SourceText">&lt;body&gt;</text:span>, etc.).</text:p>
      <text:list text:style-name="LFO4" text:continue-numbering="true">
        <text:list-item>
          <text:p text:style-name="P28">Your Arduino now only sends back a tiny confirmation message like<text:s/><text:span text:style-name="SourceText">{"status": "ok"}</text:span><text:s/>instead of a whole webpage.</text:p>
        </text:list-item>
        <text:list-item>
          <text:p text:style-name="P29">This makes the Arduino much faster because it’s sending 20 characters instead of 2,000.</text:p>
        </text:list-item>
      </text:list>
      <text:p text:style-name="HorizontalLine"/>
      <text:h text:style-name="Titre3" text:outline-level="3">Step 5: The JavaScript "Bridge"</text:h>
      <text:p text:style-name="Textbody">In your HTML file saved on the platform, you will add a small script. It looks like this:</text:p>
      <text:p text:style-name="Textbody"/>
      <text:p text:style-name="Textbody">function toggleLED(state) { // Replace with your Public IP address fetch('http://YOUR_PUBLIC_IP/LED_BUILTIN/' + state) .then(response =&gt; console.log("Success!")) .catch(error =&gt; console.log("Error:", error)); }</text:p>
      <text:p text:style-name="Textbody"/>
      <text:h text:style-name="Titre3" text:outline-level="3">Summary of the New Flow</text:h>
      <text:list text:style-name="LFO5" text:continue-numbering="true">
        <text:list-item>
          <text:p text:style-name="P30"><text:span text:style-name="T31">You:</text:span><text:s/>Open<text:s/><text:span text:style-name="SourceText">my-cool-site.com</text:span><text:s/>on your phone (hosted on a Cloud Platform).</text:p>
        </text:list-item>
        <text:list-item>
          <text:p text:style-name="P32"><text:span text:style-name="T33">You:</text:span><text:s/>Click the<text:s/><text:span text:style-name="T34">ON</text:span><text:s/>button.</text:p>
        </text:list-item>
        <text:list-item>
          <text:p text:style-name="P35"><text:span text:style-name="T36">The Web Page:</text:span><text:s/>Runs JavaScript to send a "GET" request to your<text:s/><text:span text:style-name="T37">Home Router</text:span>.</text:p>
        </text:list-item>
        <text:list-item>
          <text:p text:style-name="P38"><text:span text:style-name="T39">The Router:</text:span><text:s/>Sees the request and passes it to the<text:s/><text:span text:style-name="T40">Arduino</text:span>.</text:p>
        </text:list-item>
        <text:list-item>
          <text:p text:style-name="P41"><text:span text:style-name="T42">The Arduino:</text:span><text:s/>Sees<text:s/><text:span text:style-name="SourceText">/ON</text:span>, flips the bit in the<text:s/><text:span text:style-name="T43">RAM Register</text:span>, and the LED lights up.</text:p>
        </text:list-item>
      </text:list>
      <text:p text:style-name="Textbody"/>
      <text:p text:style-name="Textbody"/>
      <text:soft-page-break/>
      <text:p text:style-name="P44"><text:span text:style-name="T45">can you resume all these information from this discussion in three pages</text:span></text:p>
      <text:p text:style-name="P46">Since we have covered everything from low-level hardware registers to high-level cloud architecture, I have organized this summary into three distinct "chapters" (pages). This follows the evolution of your project.</text:p>
      <text:section text:name="Sect1" text:style-name="S1">
        <text:p text:style-name="P47"/>
        <text:h text:style-name="P48" text:outline-level="2">Page 1: The Local Web Server (The Current Setup)</text:h>
        <text:p text:style-name="P49"><text:span text:style-name="T50">In your current project, the<text:s/></text:span><text:span text:style-name="T51">Arduino UNO R4 WiFi</text:span><text:span text:style-name="T52"><text:s/>acts as a "Stand-alone Host."</text:span></text:p>
        <text:h text:style-name="P53" text:outline-level="3">1. How the Hardware Works</text:h>
        <text:list text:style-name="LFO6" text:continue-numbering="true">
          <text:list-item>
            <text:p text:style-name="P54"><text:span text:style-name="T55">The "Poet" Model:</text:span><text:span text:style-name="T56"><text:s/>The Arduino does not have a hard drive. It stores the HTML code in its<text:s/></text:span><text:span text:style-name="T57">Flash Memory</text:span><text:span text:style-name="T58">. Every time you visit the IP address, the Arduino "recites" (streams) the HTML text line-by-line to your browser.</text:span></text:p>
          </text:list-item>
          <text:list-item>
            <text:p text:style-name="P59"><text:span text:style-name="T60">The Listening Loop:</text:span><text:span text:style-name="T61"><text:s/>The<text:s/></text:span><text:span text:style-name="T62">loop()</text:span><text:span text:style-name="T63"><text:s/>function runs thousands of times per second. It "polls" the Wi-Fi chip to see if a browser has sent a "knock" (a request) to<text:s/></text:span><text:span text:style-name="T64">Port 80</text:span><text:span text:style-name="T65">.</text:span></text:p>
          </text:list-item>
          <text:list-item>
            <text:p text:style-name="P66"><text:span text:style-name="T67">The RAM &amp; Registers:</text:span><text:span text:style-name="T68"><text:s/>When you click "ON," the Arduino reads the incoming bits, stores them in an<text:s/></text:span><text:span text:style-name="T69">SRAM Buffer</text:span><text:span text:style-name="T70">, and identifies the command. It then flips a specific bit in a<text:s/></text:span><text:span text:style-name="T71">GPIO Register</text:span><text:span text:style-name="T72"><text:s/>from<text:s/></text:span><text:span text:style-name="T73">0</text:span><text:span text:style-name="T74"><text:s/>to<text:s/></text:span><text:span text:style-name="T75">1</text:span><text:span text:style-name="T76">. This physically opens a transistor to send 3.3V to the LED.</text:span></text:p>
          </text:list-item>
        </text:list>
        <text:h text:style-name="P77" text:outline-level="3">2. The IP Address Logic</text:h>
        <text:list text:style-name="LFO7" text:continue-numbering="true">
          <text:list-item>
            <text:p text:style-name="P78"><text:span text:style-name="T79">0.0.0.0 Error:</text:span><text:span text:style-name="T80"><text:s/>This means the Arduino is "on" but hasn't received an address from the router's<text:s/></text:span><text:span text:style-name="T81">DHCP server</text:span><text:span text:style-name="T82">.</text:span></text:p>
          </text:list-item>
          <text:list-item>
            <text:p text:style-name="P83"><text:span text:style-name="T84">The Handshake:</text:span><text:span text:style-name="T85"><text:s/>Connection happens in two steps: first, the Wi-Fi password check (</text:span><text:span text:style-name="T86">Authentication</text:span><text:span text:style-name="T87">), and second, the router giving the Arduino a "seat" at the table (</text:span><text:span text:style-name="T88">Addressing</text:span><text:span text:style-name="T89">).</text:span></text:p>
          </text:list-item>
        </text:list>
        <text:p text:style-name="P90"/>
        <text:h text:style-name="P91" text:outline-level="2">Page 2: Web Fundamentals &amp; The API Concept</text:h>
        <text:p text:style-name="P92">To move the server off the Arduino, you must understand how the "Modern Web" communicates.</text:p>
        <text:h text:style-name="P93" text:outline-level="3">1. The Ingredients of a Webpage</text:h>
        <text:list text:style-name="LFO8" text:continue-numbering="true">
          <text:list-item>
            <text:p text:style-name="P94"><text:span text:style-name="T95">HTML:</text:span><text:span text:style-name="T96"><text:s/>The "Bones" (structure/buttons).</text:span></text:p>
          </text:list-item>
          <text:list-item>
            <text:p text:style-name="P97"><text:span text:style-name="T98">CSS:</text:span><text:span text:style-name="T99"><text:s/>The "Skin" (colors/styling).</text:span></text:p>
          </text:list-item>
          <text:list-item>
            <text:p text:style-name="P100"><text:span text:style-name="T101">JavaScript:</text:span><text:span text:style-name="T102"><text:s/>The "Brain" (makes the buttons send data without refreshing the page).</text:span></text:p>
          </text:list-item>
        </text:list>
        <text:h text:style-name="P103" text:outline-level="3">2. The Browser's Journey (DNS &amp; Packets)</text:h>
        <text:p text:style-name="P104"><text:span text:style-name="T105">When you type a name like<text:s/></text:span><text:span text:style-name="T106">www.google.com</text:span><text:span text:style-name="T107">:</text:span></text:p>
        <text:list text:style-name="LFO9" text:continue-numbering="true">
          <text:list-item>
            <text:p text:style-name="P108"><text:span text:style-name="T109">DNS:</text:span><text:span text:style-name="T110"><text:s/>A "Phonebook" translates the name into a numerical<text:s/></text:span><text:span text:style-name="T111">IP Address</text:span><text:span text:style-name="T112">.</text:span></text:p>
          </text:list-item>
          <text:list-item>
            <text:p text:style-name="P113"><text:span text:style-name="T114">TCP Handshake:</text:span><text:span text:style-name="T115"><text:s/>Your laptop and the server do a quick "Are you there?" "Yes!" "Great!" digital greeting.</text:span></text:p>
          </text:list-item>
          <text:list-item>
            <text:p text:style-name="P116"><text:span text:style-name="T117">Packets:</text:span><text:span text:style-name="T118"><text:s/>The webpage is chopped into small 1500-byte boxes. Your browser reassembles them to show the page.</text:span></text:p>
          </text:list-item>
        </text:list>
        <text:h text:style-name="P119" text:outline-level="3">3. What is an API?</text:h>
        <text:p text:style-name="P120"><text:span text:style-name="T121">An<text:s/></text:span><text:span text:style-name="T122">API (Application Programming Interface)</text:span><text:span text:style-name="T123"><text:s/>is a "Menu of Services." Instead of the Arduino sending a whole webpage, it becomes an<text:s/></text:span><text:span text:style-name="T124">API Endpoint</text:span><text:span text:style-name="T125">. It waits for a tiny command like<text:s/></text:span><text:span text:style-name="T126">GET /LED/ON</text:span><text:span text:style-name="T127"><text:s/>and sends back a tiny response like<text:s/></text:span><text:span text:style-name="T128">{"status":"ok"}</text:span><text:span text:style-name="T129">. This is much more efficient for the Arduino's limited memory.</text:span></text:p>
        <text:p text:style-name="P130"/>
        <text:h text:style-name="P131" text:outline-level="2">Page 3: The IoT Cloud Architecture (The Next Goal)</text:h>
        <text:p text:style-name="P132"><text:span text:style-name="T133">You are moving to a "Three-Tier" system:<text:s/></text:span><text:span text:style-name="T134">HTML → Node.js → Arduino</text:span><text:span text:style-name="T135">.</text:span></text:p>
        <text:h text:style-name="P136" text:outline-level="3">1. The Role of Node.js (The Middleman)</text:h>
        <text:list text:style-name="LFO10" text:continue-numbering="true">
          <text:list-item>
            <text:p text:style-name="P137"><text:span text:style-name="T138">Why use it?</text:span><text:span text:style-name="T139"><text:s/>It provides<text:s/></text:span><text:span text:style-name="T140">Security</text:span><text:span text:style-name="T141"><text:s/>(passwords),<text:s/></text:span><text:span text:style-name="T142">Stability</text:span><text:span text:style-name="T143"><text:s/>(handles many users), and<text:s/></text:span><text:span text:style-name="T144">Logic</text:span><text:span text:style-name="T145"><text:s/>(remembers history/data).</text:span></text:p>
          </text:list-item>
          <text:list-item>
            <text:p text:style-name="P146"><text:span text:style-name="T147">LTS Version:</text:span><text:span text:style-name="T148"><text:s/>You use the "Long Term Support" version of Node.js because it is stable, secure, and won't break your code with experimental updates.</text:span></text:p>
          </text:list-item>
        </text:list>
        <text:h text:style-name="P149" text:outline-level="3">2. The Communication Flow</text:h>
        <text:list text:style-name="LFO11" text:continue-numbering="true">
          <text:list-item>
            <text:p text:style-name="P150"><text:span text:style-name="T151">Frontend:</text:span><text:span text:style-name="T152"><text:s/>Your HTML/JS page is hosted on the web (e.g., Netlify). You click a button.</text:span></text:p>
          </text:list-item>
          <text:list-item>
            <text:p text:style-name="P153"><text:span text:style-name="T154">Backend:</text:span><text:span text:style-name="T155"><text:s/>The click sends a request to your<text:s/></text:span><text:span text:style-name="T156">Node.js Server</text:span><text:span text:style-name="T157"><text:s/>(hosted on your laptop or in the Cloud).</text:span></text:p>
          </text:list-item>
          <text:list-item>
            <text:p text:style-name="P158"><text:span text:style-name="T159">The Bridge:</text:span><text:span text:style-name="T160"><text:s/>Node.js identifies you are allowed to control the light and sends a private request to your home<text:s/></text:span><text:span text:style-name="T161">Router</text:span><text:span text:style-name="T162">.</text:span></text:p>
          </text:list-item>
          <text:list-item>
            <text:p text:style-name="P163"><text:span text:style-name="T164">Port Forwarding:</text:span><text:span text:style-name="T165"><text:s/>Your router sees the incoming request from Node.js and "forwards" it to the<text:s/></text:span><text:span text:style-name="T166">Arduino's Local IP</text:span><text:span text:style-name="T167">.</text:span></text:p>
          </text:list-item>
          <text:list-item>
            <text:p text:style-name="P168"><text:span text:style-name="T169">Execution:</text:span><text:span text:style-name="T170"><text:s/>The Arduino flips the LED and tells Node.js "Done," which then tells your webpage "Done."</text:span></text:p>
          </text:list-item>
        </text:list>
        <text:h text:style-name="P171" text:outline-level="3">3. Hosting Options</text:h>
        <text:list text:style-name="LFO12" text:continue-numbering="true">
          <text:list-item>
            <text:p text:style-name="P172"><text:span text:style-name="T173">Local:</text:span><text:span text:style-name="T174"><text:s/>Run Node.js on your laptop for testing.</text:span></text:p>
          </text:list-item>
          <text:list-item>
            <text:p text:style-name="P175"><text:span text:style-name="T176">Private Cloud:</text:span><text:span text:style-name="T177"><text:s/>Run Node.js on a<text:s/></text:span><text:span text:style-name="T178">Raspberry Pi</text:span><text:span text:style-name="T179"><text:s/>inside your house.</text:span></text:p>
          </text:list-item>
          <text:list-item>
            <text:p text:style-name="P180"><text:span text:style-name="T181">Public Cloud:</text:span><text:span text:style-name="T182"><text:s/>Run Node.js on a service like<text:s/></text:span><text:span text:style-name="T183">Render</text:span><text:span text:style-name="T184"><text:s/>or<text:s/></text:span><text:span text:style-name="T185">Railway</text:span><text:span text:style-name="T186"><text:s/>to control your house from anywhere in the world.</text:span></text:p>
          </text:list-item>
        </text:list>
      </text:section>
      <text:section text:name="Sect2" text:style-name="S2">
        <text:p text:style-name="Textbody"/>
        <text:p text:style-name="Textbody"/>
        <text:soft-page-break/>
        <text:p text:style-name="P187">Starting the web page + API</text:p>
        <text:p text:style-name="Textbody"/>
        <text:h text:style-name="Titre2" text:outline-level="2">End-to-End Setup (Free Host + Arduino LED)</text:h>
        <text:p text:style-name="P188">This is the full flow to get a public web page + API online, then control <text:span text:style-name="T189">LED_BUILTIN</text:span> on your <text:span text:style-name="T190">UNO R4 WiFi</text:span>.</text:p>
        <text:p text:style-name="P191"/>
        <text:h text:style-name="P192" text:outline-level="3">1) Prepare your project files (already mostly done)</text:h>
        <text:p text:style-name="Textbody">Create these files in one folder:</text:p>
        <text:list text:style-name="LFO13" text:continue-numbering="true">
          <text:list-item>
            <text:p text:style-name="P193"><text:span text:style-name="T194">package.json</text:span></text:p>
          </text:list-item>
          <text:list-item>
            <text:p text:style-name="P195"><text:span text:style-name="T196">server.js</text:span></text:p>
          </text:list-item>
          <text:list-item>
            <text:p text:style-name="P197"><text:span text:style-name="T198">public/index.html</text:span></text:p>
          </text:list-item>
        </text:list>
        <text:p text:style-name="Textbody">You already have working versions, but here is the expected behavior:</text:p>
        <text:list text:style-name="LFO14" text:continue-numbering="true">
          <text:list-item>
            <text:p text:style-name="P199">Web page has <text:span text:style-name="T200">ON</text:span> and <text:span text:style-name="T201">OFF</text:span> buttons</text:p>
          </text:list-item>
          <text:list-item>
            <text:p text:style-name="P202"><text:span text:style-name="T203">POST /api/led</text:span> sets state (<text:span text:style-name="T204">on</text:span> / <text:span text:style-name="T205">off</text:span>)</text:p>
          </text:list-item>
          <text:list-item>
            <text:p text:style-name="P206"><text:span text:style-name="T207">GET /api/led</text:span> returns current state</text:p>
          </text:list-item>
        </text:list>
        <text:p text:style-name="P208"/>
        <text:h text:style-name="P209" text:outline-level="3">2) Test locally first</text:h>
        <text:p text:style-name="Textbody">In that folder:</text:p>
        <text:p text:style-name="P210">npm install</text:p>
        <text:p text:style-name="P211">npm start</text:p>
        <text:p text:style-name="Textbody">Open:</text:p>
        <text:list text:style-name="LFO15" text:continue-numbering="true">
          <text:list-item>
            <text:p text:style-name="P212"><text:span text:style-name="T213">http://localhost:3000</text:span> (page)</text:p>
          </text:list-item>
          <text:list-item>
            <text:p text:style-name="P214"><text:span text:style-name="T215">http://localhost:3000/api/led</text:span> (API)</text:p>
          </text:list-item>
        </text:list>
        <text:p text:style-name="Textbody">Why: local test avoids deploying broken code.</text:p>
        <text:p text:style-name="P216"/>
        <text:h text:style-name="P217" text:outline-level="3">3) Put project on GitHub</text:h>
        <text:p text:style-name="Textbody">In terminal (inside project folder):</text:p>
        <text:p text:style-name="P218">git init</text:p>
        <text:p text:style-name="P219">git add .</text:p>
        <text:p text:style-name="P220">git commit -m "Add LED control web app and API"</text:p>
        <text:p text:style-name="P221">git branch -M main</text:p>
        <text:p text:style-name="P222">git remote add origin https://github.com/&lt;your-user&gt;/&lt;your-repo&gt;.git</text:p>
        <text:p text:style-name="P223">git push -u origin main</text:p>
        <text:p text:style-name="Textbody"><draw:frame draw:z-index="251659264" draw:id="id0" draw:style-name="a0" draw:name="Cadre2" text:anchor-type="paragraph" svg:x="0in" svg:y="0in" svg:width="3.23958in" svg:height="0.0625in" style:rel-width="scale" style:rel-height="scale"><draw:text-box><text:p text:style-name="Textbody"/></draw:text-box><svg:title/><svg:desc/></draw:frame>Why: Render deploys directly from GitHub.</text:p>
        <text:p text:style-name="P224"/>
        <text:soft-page-break/>
        <text:h text:style-name="P225" text:outline-level="3">4) Deploy on free Render web service</text:h>
        <text:list text:style-name="LFO16" text:continue-numbering="true">
          <text:list-item>
            <text:p text:style-name="P226">Go to <text:a xlink:href="https://render.com/" office:target-frame-name="_top" xlink:show="replace">Render</text:a></text:p>
          </text:list-item>
          <text:list-item>
            <text:p text:style-name="P227">Create account and connect GitHub</text:p>
          </text:list-item>
          <text:list-item>
            <text:p text:style-name="P228">Click New + -&gt; Web Service</text:p>
          </text:list-item>
          <text:list-item>
            <text:p text:style-name="P229">Select your repo</text:p>
          </text:list-item>
          <text:list-item>
            <text:p text:style-name="P230">Set:</text:p>
            <text:list text:continue-numbering="true">
              <text:list-item>
                <text:p text:style-name="P231">Runtime: <text:span text:style-name="T232">Node</text:span></text:p>
              </text:list-item>
              <text:list-item>
                <text:p text:style-name="P233">Build command: <text:span text:style-name="T234">npm install</text:span></text:p>
              </text:list-item>
              <text:list-item>
                <text:p text:style-name="P235">Start command: <text:span text:style-name="T236">npm start</text:span></text:p>
              </text:list-item>
            </text:list>
          </text:list-item>
          <text:list-item>
            <text:p text:style-name="P237">Deploy</text:p>
          </text:list-item>
        </text:list>
        <text:p text:style-name="Textbody">You will get URL like:</text:p>
        <text:list text:style-name="LFO17" text:continue-numbering="true">
          <text:list-item>
            <text:p text:style-name="P238"><text:span text:style-name="T239">https://your-app.onrender.com</text:span></text:p>
          </text:list-item>
        </text:list>
        <text:p text:style-name="Textbody">Now both are online:</text:p>
        <text:list text:style-name="LFO18" text:continue-numbering="true">
          <text:list-item>
            <text:p text:style-name="P240">Web page: <text:span text:style-name="T241">https://your-app.onrender.com</text:span></text:p>
          </text:list-item>
          <text:list-item>
            <text:p text:style-name="P242">API: <text:span text:style-name="T243">https://your-app.onrender.com/api/led</text:span></text:p>
          </text:list-item>
        </text:list>
        <text:p text:style-name="P244"/>
        <text:h text:style-name="P245" text:outline-level="3">5) Confirm API works online</text:h>
        <text:p text:style-name="Textbody">From browser or Postman:</text:p>
        <text:list text:style-name="LFO19" text:continue-numbering="true">
          <text:list-item>
            <text:p text:style-name="P246"><text:span text:style-name="T247">GET https://your-app.onrender.com/api/led</text:span> -&gt; <text:span text:style-name="T248">{"state":"off"}</text:span> (or <text:span text:style-name="T249">on</text:span>)</text:p>
          </text:list-item>
          <text:list-item>
            <text:p text:style-name="P250">Send <text:span text:style-name="T251">POST https://your-app.onrender.com/api/led</text:span> with JSON: <text:span text:style-name="T252">{"state":"on"}</text:span></text:p>
          </text:list-item>
        </text:list>
        <text:p text:style-name="Textbody">Why: verifies cloud server is ready before Arduino step.</text:p>
        <text:p text:style-name="P253"/>
        <text:h text:style-name="P254" text:outline-level="3">6) Prepare Arduino IDE for UNO R4 WiFi</text:h>
        <text:p text:style-name="Textbody">Install/check:</text:p>
        <text:list text:style-name="LFO20" text:continue-numbering="true">
          <text:list-item>
            <text:p text:style-name="P255">Board package for <text:span text:style-name="T256">UNO R4 WiFi</text:span></text:p>
          </text:list-item>
          <text:list-item>
            <text:p text:style-name="P257">Libraries:</text:p>
            <text:list text:continue-numbering="true">
              <text:list-item>
                <text:p text:style-name="P258"><text:span text:style-name="T259">WiFiS3</text:span></text:p>
              </text:list-item>
              <text:list-item>
                <text:p text:style-name="P260"><text:span text:style-name="T261">ArduinoHttpClient</text:span> (recommended)</text:p>
              </text:list-item>
            </text:list>
          </text:list-item>
        </text:list>
        <text:p text:style-name="Textbody">Also update WiFi firmware in Arduino IDE (Firmware Updater) if HTTPS fails.</text:p>
        <text:p text:style-name="P262"/>
        <text:h text:style-name="P263" text:outline-level="3">7) Upload Arduino sketch (poll API and control LED)</text:h>
        <text:p text:style-name="Textbody">Use this template (replace placeholders):</text:p>
        <text:soft-page-break/>
        <text:p text:style-name="P264">#include &lt;WiFiS3.h&gt;</text:p>
        <text:p text:style-name="P265">#include &lt;ArduinoHttpClient.h&gt;</text:p>
        <text:p text:style-name="P266">const char* ssid = "YOUR_WIFI_NAME";</text:p>
        <text:p text:style-name="P267">const char* pass = "YOUR_WIFI_PASSWORD";</text:p>
        <text:p text:style-name="P268">const char* host = "your-app.onrender.com";</text:p>
        <text:p text:style-name="P269">const int httpsPort = 443;</text:p>
        <text:p text:style-name="P270">WiFiSSLClient wifi;</text:p>
        <text:p text:style-name="P271">HttpClient client(wifi, host, httpsPort);</text:p>
        <text:p text:style-name="P272">const int LED_PIN = LED_BUILTIN;</text:p>
        <text:p text:style-name="P273">unsigned long lastPoll = 0;</text:p>
        <text:p text:style-name="P274">const unsigned long intervalMs = 2000;</text:p>
        <text:p text:style-name="P275">void connectWifi() {</text:p>
        <text:p text:style-name="P276">while (WiFi.begin(ssid, pass) != WL_CONNECTED) {</text:p>
        <text:p text:style-name="P277">delay(1000);</text:p>
        <text:p text:style-name="P278">}</text:p>
        <text:p text:style-name="P279">}</text:p>
        <text:p text:style-name="P280">void setup() {</text:p>
        <text:p text:style-name="P281">pinMode(LED_PIN, OUTPUT);</text:p>
        <text:p text:style-name="P282">digitalWrite(LED_PIN, LOW);</text:p>
        <text:p text:style-name="P283">Serial.begin(115200);</text:p>
        <text:p text:style-name="P284">connectWifi();</text:p>
        <text:p text:style-name="P285">}</text:p>
        <text:p text:style-name="P286">void loop() {</text:p>
        <text:p text:style-name="P287">if (WiFi.status() != WL_CONNECTED) {</text:p>
        <text:p text:style-name="P288">connectWifi();</text:p>
        <text:p text:style-name="P289">}</text:p>
        <text:p text:style-name="P290">if (millis() - lastPoll &gt;= intervalMs) {</text:p>
        <text:p text:style-name="P291">lastPoll = millis();</text:p>
        <text:p text:style-name="P292">client.get("/api/led");</text:p>
        <text:p text:style-name="P293">int statusCode = client.responseStatusCode();</text:p>
        <text:p text:style-name="P294">String body = client.responseBody();</text:p>
        <text:p text:style-name="P295">client.stop();</text:p>
        <text:p text:style-name="P296">if (statusCode == 200) {</text:p>
        <text:p text:style-name="P297">if (body.indexOf("\"state\":\"on\"") &gt;= 0) {</text:p>
        <text:p text:style-name="P298">digitalWrite(LED_PIN, HIGH);</text:p>
        <text:p text:style-name="P299">} else if (body.indexOf("\"state\":\"off\"") &gt;= 0) {</text:p>
        <text:p text:style-name="P300">digitalWrite(LED_PIN, LOW);</text:p>
        <text:p text:style-name="P301">}</text:p>
        <text:p text:style-name="P302">}</text:p>
        <text:p text:style-name="P303">}</text:p>
        <text:p text:style-name="P304">}</text:p>
        <text:p text:style-name="P305"><draw:frame draw:z-index="2" draw:id="id1" draw:style-name="a1" draw:name="Cadre3" text:anchor-type="paragraph" svg:x="0in" svg:y="0in" svg:width="3.78056in" svg:height="0.0625in" style:rel-width="scale" style:rel-height="scale"><draw:text-box><text:p text:style-name="Textbody"/></draw:text-box><svg:title/><svg:desc/></draw:frame></text:p>
        <text:h text:style-name="P306" text:outline-level="3">8) Test full system</text:h>
        <text:list text:style-name="LFO21" text:continue-numbering="true">
          <text:list-item>
            <text:p text:style-name="P307">Open <text:span text:style-name="T308">https://your-app.onrender.com</text:span> on phone/laptop</text:p>
          </text:list-item>
          <text:list-item>
            <text:p text:style-name="P309">Click <text:span text:style-name="T310">ON</text:span> / <text:span text:style-name="T311">OFF</text:span></text:p>
          </text:list-item>
          <text:list-item>
            <text:p text:style-name="P312">Arduino polls every ~2s and updates LED</text:p>
          </text:list-item>
        </text:list>
        <text:p text:style-name="P313"/>
        <text:soft-page-break/>
        <text:h text:style-name="P314" text:outline-level="2">Important notes</text:h>
        <text:list text:style-name="LFO22" text:continue-numbering="true">
          <text:list-item>
            <text:p text:style-name="P315">Your current server stores state in memory; after server restart it resets to <text:span text:style-name="T316">off</text:span> (fine for prototype).</text:p>
          </text:list-item>
          <text:list-item>
            <text:p text:style-name="P317">Render free tier may “sleep”; first request can be slow.</text:p>
          </text:list-item>
          <text:list-item>
            <text:p text:style-name="P318">For security later, add an API key so random people can’t toggle your LED.</text:p>
          </text:list-item>
        </text:list>
        <text:p text:style-name="P319"/>
        <text:p text:style-name="Textbody">If you want, I can now give you a hardened v2:</text:p>
        <text:list text:style-name="LFO23" text:continue-numbering="true">
          <text:list-item>
            <text:p text:style-name="P320">API key protection</text:p>
          </text:list-item>
          <text:list-item>
            <text:p text:style-name="P321">Arduino sends key header</text:p>
          </text:list-item>
          <text:list-item>
            <text:p text:style-name="P322"><text:span text:style-name="T323">cleaner status model (</text:span><text:span text:style-name="T324">desired</text:span><text:span text:style-name="T325"> vs </text:span><text:span text:style-name="T326">lastSeen</text:span><text:span text:style-name="T327">) for better UI feedback.</text:span></text:p>
          </text:list-item>
        </text:list>
        <text:p text:style-name="Textbod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Google Sans Flex" svg:font-family="Google Sans Flex" style:font-family-generic="system"/>
    <style:font-face style:name="Consolas, 'Courier New', monosp" svg:font-family="Consolas, 'Courier New', monosp" style:font-family-generic="system"/>
    <style:font-face style:name="Arial" svg:font-family="Arial" style:font-family-generic="swiss" style:font-pitch="variable" svg:panose-1="2 11 6 4 2 2 2 2 2 4"/>
    <style:font-face style:name="Segoe WPC" svg:font-family="Segoe WPC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bullet text:level="1" text:style-name="WW_CharLFO6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bullet text:level="1" text:style-name="WW_CharLFO12LVL1" text:bullet-char="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6LVL2" text:bullet-char="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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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hmad Saab</dc:creator>
    <meta:creation-date>2026-03-31T12:22:00Z</meta:creation-date>
    <dc:date>2026-04-09T09:47:00Z</dc:date>
    <meta:template xlink:href="Normal.dotm" xlink:type="simple"/>
    <meta:editing-cycles>4</meta:editing-cycles>
    <meta:editing-duration>PT1140S</meta:editing-duration>
    <meta:document-statistic meta:page-count="9" meta:paragraph-count="19" meta:word-count="1511" meta:character-count="9807" meta:row-count="69" meta:non-whitespace-character-count="8315"/>
  </office:meta>
</office:document-meta>
</file>