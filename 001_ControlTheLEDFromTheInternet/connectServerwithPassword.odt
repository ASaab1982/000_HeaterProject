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dc5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cd C:\Users\dalia\OneDrive\Documents\Arduino\402_ControlTheLEDFromTheInternet</text:p>
      <text:p text:style-name="Text_20_body">$env:WEB_USERNAME="<text:span text:style-name="T1">ahmad</text:span>"; $env:WEB_PASSWORD="<text:span text:style-name="T1">dalia</text:span>"; npm start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1T16:06:20.050186500</meta:creation-date>
    <dc:date>2026-03-31T16:16:44.245081400</dc:date>
    <meta:editing-duration>PT40S</meta:editing-duration>
    <meta:editing-cycles>3</meta:editing-cycles>
    <meta:generator>LibreOffice/26.2.1.2$Windows_X86_64 LibreOffice_project/620$Build-2</meta:generator>
    <meta:document-statistic meta:table-count="0" meta:image-count="0" meta:object-count="0" meta:page-count="1" meta:paragraph-count="2" meta:word-count="6" meta:character-count="140" meta:non-whitespace-character-count="136"/>
  </office:meta>
</office:document-meta>
</file>